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B0000028FB505ED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au1" style:family="table">
      <style:table-properties style:width="15.921cm" fo:margin-left="0cm" fo:margin-top="0cm" fo:margin-bottom="0cm" table:align="left" style:writing-mode="page"/>
    </style:style>
    <style:style style:name="Tableau1.A" style:family="table-column">
      <style:table-column-properties style:column-width="2.115cm"/>
    </style:style>
    <style:style style:name="Tableau1.B" style:family="table-column">
      <style:table-column-properties style:column-width="13.804cm"/>
    </style:style>
    <style:style style:name="Tableau1.1" style:family="table-row">
      <style:table-row-properties fo:keep-together="auto"/>
    </style:style>
    <style:style style:name="Tableau1.A1" style:family="table-cell">
      <style:table-cell-properties style:vertical-align="middle" fo:background-color="#2e75b6" fo:padding-left="0.212cm" fo:padding-right="0.212cm" fo:padding-top="0.141cm" fo:padding-bottom="0.141cm" fo:border="none">
        <style:background-image/>
      </style:table-cell-properties>
    </style:style>
    <style:style style:name="Tableau1.B1" style:family="table-cell">
      <style:table-cell-properties fo:background-color="#d6e4f0" fo:padding-left="0.282cm" fo:padding-right="0.212cm" fo:padding-top="0.141cm" fo:padding-bottom="0.141cm" fo:border="none">
        <style:background-image/>
      </style:table-cell-properties>
    </style:style>
    <style:style style:name="Tableau2" style:family="table">
      <style:table-properties style:width="15.921cm" fo:margin-left="0cm" fo:margin-top="0cm" fo:margin-bottom="0cm" table:align="left" style:writing-mode="page"/>
    </style:style>
    <style:style style:name="Tableau2.A" style:family="table-column">
      <style:table-column-properties style:column-width="2.115cm"/>
    </style:style>
    <style:style style:name="Tableau2.B" style:family="table-column">
      <style:table-column-properties style:column-width="13.804cm"/>
    </style:style>
    <style:style style:name="Tableau2.1" style:family="table-row">
      <style:table-row-properties fo:keep-together="auto"/>
    </style:style>
    <style:style style:name="Tableau2.A1" style:family="table-cell">
      <style:table-cell-properties style:vertical-align="middle" fo:background-color="#2e75b6" fo:padding-left="0.212cm" fo:padding-right="0.212cm" fo:padding-top="0.141cm" fo:padding-bottom="0.141cm" fo:border="none">
        <style:background-image/>
      </style:table-cell-properties>
    </style:style>
    <style:style style:name="Tableau2.B1" style:family="table-cell">
      <style:table-cell-properties fo:background-color="#d6e4f0" fo:padding-left="0.282cm" fo:padding-right="0.212cm" fo:padding-top="0.141cm" fo:padding-bottom="0.141cm" fo:border="none">
        <style:background-image/>
      </style:table-cell-properties>
    </style:style>
    <style:style style:name="Tableau3" style:family="table">
      <style:table-properties style:width="15.921cm" fo:margin-left="0cm" fo:margin-top="0cm" fo:margin-bottom="0cm" table:align="left" style:writing-mode="page"/>
    </style:style>
    <style:style style:name="Tableau3.A" style:family="table-column">
      <style:table-column-properties style:column-width="2.115cm"/>
    </style:style>
    <style:style style:name="Tableau3.B" style:family="table-column">
      <style:table-column-properties style:column-width="13.804cm"/>
    </style:style>
    <style:style style:name="Tableau3.1" style:family="table-row">
      <style:table-row-properties fo:keep-together="auto"/>
    </style:style>
    <style:style style:name="Tableau3.A1" style:family="table-cell">
      <style:table-cell-properties style:vertical-align="middle" fo:background-color="#2e75b6" fo:padding-left="0.212cm" fo:padding-right="0.212cm" fo:padding-top="0.141cm" fo:padding-bottom="0.141cm" fo:border="none">
        <style:background-image/>
      </style:table-cell-properties>
    </style:style>
    <style:style style:name="Tableau3.B1" style:family="table-cell">
      <style:table-cell-properties fo:background-color="#d6e4f0" fo:padding-left="0.282cm" fo:padding-right="0.212cm" fo:padding-top="0.141cm" fo:padding-bottom="0.141cm" fo:border="none">
        <style:background-image/>
      </style:table-cell-properties>
    </style:style>
    <style:style style:name="Tableau4" style:family="table">
      <style:table-properties style:width="15.921cm" fo:margin-left="0cm" fo:margin-top="0cm" fo:margin-bottom="0cm" table:align="left" style:writing-mode="page"/>
    </style:style>
    <style:style style:name="Tableau4.A" style:family="table-column">
      <style:table-column-properties style:column-width="2.115cm"/>
    </style:style>
    <style:style style:name="Tableau4.B" style:family="table-column">
      <style:table-column-properties style:column-width="13.804cm"/>
    </style:style>
    <style:style style:name="Tableau4.1" style:family="table-row">
      <style:table-row-properties fo:keep-together="auto"/>
    </style:style>
    <style:style style:name="Tableau4.A1" style:family="table-cell">
      <style:table-cell-properties style:vertical-align="middle" fo:background-color="#2e75b6" fo:padding-left="0.212cm" fo:padding-right="0.212cm" fo:padding-top="0.141cm" fo:padding-bottom="0.141cm" fo:border="none">
        <style:background-image/>
      </style:table-cell-properties>
    </style:style>
    <style:style style:name="Tableau4.B1" style:family="table-cell">
      <style:table-cell-properties fo:background-color="#d6e4f0" fo:padding-left="0.282cm" fo:padding-right="0.212cm" fo:padding-top="0.141cm" fo:padding-bottom="0.141cm" fo:border="none">
        <style:background-image/>
      </style:table-cell-properties>
    </style:style>
    <style:style style:name="Tableau5" style:family="table">
      <style:table-properties style:width="15.921cm" fo:margin-left="0cm" fo:margin-top="0cm" fo:margin-bottom="0cm" table:align="left" style:writing-mode="page"/>
    </style:style>
    <style:style style:name="Tableau5.A" style:family="table-column">
      <style:table-column-properties style:column-width="2.115cm"/>
    </style:style>
    <style:style style:name="Tableau5.B" style:family="table-column">
      <style:table-column-properties style:column-width="13.804cm"/>
    </style:style>
    <style:style style:name="Tableau5.1" style:family="table-row">
      <style:table-row-properties fo:keep-together="auto"/>
    </style:style>
    <style:style style:name="Tableau5.A1" style:family="table-cell">
      <style:table-cell-properties style:vertical-align="middle" fo:background-color="#2e75b6" fo:padding-left="0.212cm" fo:padding-right="0.212cm" fo:padding-top="0.141cm" fo:padding-bottom="0.141cm" fo:border="none">
        <style:background-image/>
      </style:table-cell-properties>
    </style:style>
    <style:style style:name="Tableau5.B1" style:family="table-cell">
      <style:table-cell-properties fo:background-color="#d6e4f0" fo:padding-left="0.282cm" fo:padding-right="0.212cm" fo:padding-top="0.141cm" fo:padding-bottom="0.141cm" fo:border="none">
        <style:background-image/>
      </style:table-cell-properties>
    </style:style>
    <style:style style:name="Tableau6" style:family="table">
      <style:table-properties style:width="15.921cm" fo:margin-left="0.002cm" fo:margin-top="0cm" fo:margin-bottom="0cm" table:align="left" style:writing-mode="page"/>
    </style:style>
    <style:style style:name="Tableau6.A" style:family="table-column">
      <style:table-column-properties style:column-width="5.306cm"/>
    </style:style>
    <style:style style:name="Tableau6.B" style:family="table-column">
      <style:table-column-properties style:column-width="5.304cm"/>
    </style:style>
    <style:style style:name="Tableau6.C" style:family="table-column">
      <style:table-column-properties style:column-width="5.311cm"/>
    </style:style>
    <style:style style:name="Tableau6.1" style:family="table-row">
      <style:table-row-properties fo:keep-together="auto"/>
    </style:style>
    <style:style style:name="Tableau6.A1" style:family="table-cell">
      <style:table-cell-properties fo:background-color="#2e75b6" fo:padding-left="0.212cm" fo:padding-right="0.212cm" fo:padding-top="0.141cm" fo:padding-bottom="0.141cm" fo:border="0.1pt solid #cccccc">
        <style:background-image/>
      </style:table-cell-properties>
    </style:style>
    <style:style style:name="Tableau6.A2" style:family="table-cell">
      <style:table-cell-properties fo:background-color="#ffffff" fo:padding-left="0.212cm" fo:padding-right="0.212cm" fo:padding-top="0.141cm" fo:padding-bottom="0.141cm" fo:border="0.1pt solid #cccccc">
        <style:background-image/>
      </style:table-cell-properties>
    </style:style>
    <style:style style:name="Tableau6.A3" style:family="table-cell">
      <style:table-cell-properties fo:background-color="#ebf3fb" fo:padding-left="0.212cm" fo:padding-right="0.212cm" fo:padding-top="0.141cm" fo:padding-bottom="0.141cm" fo:border="0.1pt solid #cccccc">
        <style:background-image/>
      </style:table-cell-properties>
    </style:style>
    <style:style style:name="Tableau7" style:family="table">
      <style:table-properties style:width="15.921cm" fo:margin-left="0.002cm" fo:margin-top="0cm" fo:margin-bottom="0cm" table:align="left" style:writing-mode="page"/>
    </style:style>
    <style:style style:name="Tableau7.A" style:family="table-column">
      <style:table-column-properties style:column-width="5.306cm"/>
    </style:style>
    <style:style style:name="Tableau7.B" style:family="table-column">
      <style:table-column-properties style:column-width="5.304cm"/>
    </style:style>
    <style:style style:name="Tableau7.C" style:family="table-column">
      <style:table-column-properties style:column-width="5.311cm"/>
    </style:style>
    <style:style style:name="Tableau7.1" style:family="table-row">
      <style:table-row-properties fo:keep-together="auto"/>
    </style:style>
    <style:style style:name="Tableau7.A1" style:family="table-cell">
      <style:table-cell-properties fo:background-color="#2e75b6" fo:padding-left="0.212cm" fo:padding-right="0.212cm" fo:padding-top="0.141cm" fo:padding-bottom="0.141cm" fo:border="0.1pt solid #cccccc">
        <style:background-image/>
      </style:table-cell-properties>
    </style:style>
    <style:style style:name="Tableau7.A2" style:family="table-cell">
      <style:table-cell-properties fo:background-color="#ffffff" fo:padding-left="0.212cm" fo:padding-right="0.212cm" fo:padding-top="0.141cm" fo:padding-bottom="0.141cm" fo:border="0.1pt solid #cccccc">
        <style:background-image/>
      </style:table-cell-properties>
    </style:style>
    <style:style style:name="Tableau7.A3" style:family="table-cell">
      <style:table-cell-properties fo:background-color="#ebf3fb" fo:padding-left="0.212cm" fo:padding-right="0.212cm" fo:padding-top="0.141cm" fo:padding-bottom="0.141cm" fo:border="0.1pt solid #cccccc">
        <style:background-image/>
      </style:table-cell-properties>
    </style:style>
    <style:style style:name="Tableau8" style:family="table">
      <style:table-properties style:width="15.921cm" fo:margin-left="0cm" fo:margin-top="0cm" fo:margin-bottom="0cm" table:align="left" style:writing-mode="page"/>
    </style:style>
    <style:style style:name="Tableau8.A" style:family="table-column">
      <style:table-column-properties style:column-width="2.115cm"/>
    </style:style>
    <style:style style:name="Tableau8.B" style:family="table-column">
      <style:table-column-properties style:column-width="13.804cm"/>
    </style:style>
    <style:style style:name="Tableau8.1" style:family="table-row">
      <style:table-row-properties fo:keep-together="auto"/>
    </style:style>
    <style:style style:name="Tableau8.A1" style:family="table-cell">
      <style:table-cell-properties style:vertical-align="middle" fo:background-color="#2e75b6" fo:padding-left="0.212cm" fo:padding-right="0.212cm" fo:padding-top="0.141cm" fo:padding-bottom="0.141cm" fo:border="none">
        <style:background-image/>
      </style:table-cell-properties>
    </style:style>
    <style:style style:name="Tableau8.B1" style:family="table-cell">
      <style:table-cell-properties fo:background-color="#d6e4f0" fo:padding-left="0.282cm" fo:padding-right="0.212cm" fo:padding-top="0.141cm" fo:padding-bottom="0.141cm" fo:border="none">
        <style:background-image/>
      </style:table-cell-properties>
    </style:style>
    <style:style style:name="P1" style:family="paragraph" style:parent-style-name="Heading_20_1">
      <style:paragraph-properties fo:margin-top="0cm" fo:margin-bottom="0.212cm" style:contextual-spacing="false" fo:break-before="page" fo:padding-left="0cm" fo:padding-right="0cm" fo:padding-top="0cm" fo:padding-bottom="0.141cm" fo:border-left="none" fo:border-right="none" fo:border-top="none" fo:border-bottom="0.99pt solid #2e75b6"/>
    </style:style>
    <style:style style:name="P2" style:family="paragraph" style:parent-style-name="Heading_20_1">
      <style:paragraph-properties fo:margin-top="0.635cm" fo:margin-bottom="0.212cm" style:contextual-spacing="false" fo:padding-left="0cm" fo:padding-right="0cm" fo:padding-top="0cm" fo:padding-bottom="0.141cm" fo:border-left="none" fo:border-right="none" fo:border-top="none" fo:border-bottom="0.99pt solid #2e75b6"/>
    </style:style>
    <style:style style:name="P3" style:family="paragraph" style:parent-style-name="Heading_20_2">
      <style:paragraph-properties fo:margin-top="0.423cm" fo:margin-bottom="0.141cm" style:contextual-spacing="false"/>
    </style:style>
    <style:style style:name="P4" style:family="paragraph" style:parent-style-name="Heading_20_2">
      <style:paragraph-properties fo:margin-top="0.423cm" fo:margin-bottom="0.141cm" style:contextual-spacing="false"/>
      <style:text-properties officeooo:paragraph-rsid="0019a84f"/>
    </style:style>
    <style:style style:name="P5" style:family="paragraph" style:parent-style-name="Heading_20_3">
      <style:text-properties officeooo:rsid="0019a84f" officeooo:paragraph-rsid="001ad30f"/>
    </style:style>
    <style:style style:name="P6" style:family="paragraph" style:parent-style-name="List_20_Paragraph" style:list-style-name="WWNum2">
      <style:paragraph-properties fo:margin-top="0.071cm" fo:margin-bottom="0.071cm" style:contextual-spacing="false"/>
    </style:style>
    <style:style style:name="P7" style:family="paragraph" style:parent-style-name="Standard">
      <style:paragraph-properties fo:margin-top="0cm" fo:margin-bottom="0.353cm" style:contextual-spacing="false" fo:text-align="center" style:justify-single-word="false" fo:padding-left="0cm" fo:padding-right="0cm" fo:padding-top="0cm" fo:padding-bottom="0.282cm" fo:border-left="none" fo:border-right="none" fo:border-top="none" fo:border-bottom="1.5pt solid #2e75b6"/>
    </style:style>
    <style:style style:name="P8" style:family="paragraph" style:parent-style-name="Standard">
      <style:paragraph-properties fo:margin-top="0.353cm" fo:margin-bottom="1.411cm" style:contextual-spacing="false"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margin-top="0.106cm" fo:margin-bottom="0.212cm" style:contextual-spacing="false" fo:line-height="0.529cm"/>
    </style:style>
    <style:style style:name="P11" style:family="paragraph" style:parent-style-name="Standard">
      <style:paragraph-properties fo:margin-top="0.106cm" fo:margin-bottom="0.212cm" style:contextual-spacing="false" fo:line-height="0.529cm"/>
      <style:text-properties officeooo:paragraph-rsid="0018d789"/>
    </style:style>
    <style:style style:name="P12" style:family="paragraph" style:parent-style-name="Standard">
      <style:paragraph-properties fo:margin-top="0cm" fo:margin-bottom="0.141cm" style:contextual-spacing="false"/>
    </style:style>
    <style:style style:name="P13" style:family="paragraph" style:parent-style-name="Standard">
      <loext:graphic-properties draw:fill="solid" draw:fill-color="#f2f2f2"/>
      <style:paragraph-properties fo:margin-left="1.27cm" fo:margin-top="0.106cm" fo:margin-bottom="0.106cm" style:contextual-spacing="false" fo:background-color="#f2f2f2" fo:padding-left="0.141cm" fo:padding-right="0cm" fo:padding-top="0cm" fo:padding-bottom="0cm" fo:border-left="1.5pt solid #2e75b6" fo:border-right="none" fo:border-top="none" fo:border-bottom="none"/>
    </style:style>
    <style:style style:name="P14" style:family="paragraph" style:parent-style-name="Standard">
      <style:paragraph-properties fo:margin-top="0cm" fo:margin-bottom="0.212cm" style:contextual-spacing="false" fo:text-align="end" style:justify-single-word="false" fo:padding-left="0cm" fo:padding-right="0cm" fo:padding-top="0cm" fo:padding-bottom="0.141cm" fo:border-left="none" fo:border-right="none" fo:border-top="none" fo:border-bottom="0.74pt solid #2e75b6"/>
    </style:style>
    <style:style style:name="P15" style:family="paragraph" style:parent-style-name="Standard">
      <style:paragraph-properties fo:margin-top="0.353cm" fo:margin-bottom="1.411cm" style:contextual-spacing="false" fo:text-align="center" style:justify-single-word="false"/>
      <style:text-properties fo:font-size="26pt" style:font-size-asian="26pt" style:font-size-complex="26pt"/>
    </style:style>
    <style:style style:name="P16" style:family="paragraph" style:parent-style-name="Standard">
      <style:paragraph-properties fo:margin-top="0cm" fo:margin-bottom="0.212cm" style:contextual-spacing="false" fo:text-align="center" style:justify-single-word="false"/>
      <style:text-properties fo:font-size="20pt" style:font-size-asian="20pt" style:font-size-complex="20pt"/>
    </style:style>
    <style:style style:name="P17" style:family="paragraph" style:parent-style-name="Standard">
      <style:paragraph-properties fo:margin-top="1.058cm" fo:margin-bottom="0cm" style:contextual-spacing="false" fo:text-align="center" style:justify-single-word="false"/>
      <style:text-properties fo:font-size="32pt" style:font-size-asian="32pt" style:font-size-complex="32pt"/>
    </style:style>
    <style:style style:name="P18" style:family="paragraph" style:parent-style-name="Text_20_body">
      <style:paragraph-properties fo:margin-top="0.106cm" fo:margin-bottom="0.212cm" style:contextual-spacing="false" fo:line-height="0.529cm"/>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T1" style:family="text">
      <style:text-properties fo:color="#1f4e79" loext:opacity="100%" style:font-name="Arial" fo:font-size="16pt" fo:font-weight="bold" style:font-name-asian="Arial2" style:font-size-asian="16pt" style:font-weight-asian="bold" style:font-name-complex="Arial2" style:font-size-complex="16pt" style:font-weight-complex="bold"/>
    </style:style>
    <style:style style:name="T2" style:family="text">
      <style:text-properties fo:color="#1f4e79" loext:opacity="100%" style:font-name="Arial" fo:font-size="16pt" fo:font-weight="bold" officeooo:rsid="0019a84f" style:font-name-asian="Arial2" style:font-size-asian="16pt" style:font-weight-asian="bold" style:font-name-complex="Arial2" style:font-size-complex="16pt" style:font-weight-complex="bold"/>
    </style:style>
    <style:style style:name="T3" style:family="text">
      <style:text-properties fo:color="#1f4e79" loext:opacity="100%" style:font-name="Arial" fo:font-size="16pt" fo:font-weight="bold" officeooo:rsid="001ad30f" style:font-name-asian="Arial2" style:font-size-asian="16pt" style:font-weight-asian="bold" style:font-name-complex="Arial2" style:font-size-complex="16pt" style:font-weight-complex="bold"/>
    </style:style>
    <style:style style:name="T4" style:family="text">
      <style:text-properties fo:color="#1f4e79" loext:opacity="100%" style:font-name="Arial" fo:font-weight="bold" style:font-name-asian="Arial2" style:font-weight-asian="bold" style:font-name-complex="Arial2" style:font-weight-complex="bold"/>
    </style:style>
    <style:style style:name="T5" style:family="text">
      <style:text-properties fo:color="#1f4e79" loext:opacity="100%" style:font-name="Arial" fo:font-weight="bold" officeooo:rsid="0017131d" style:font-name-asian="Arial2" style:font-weight-asian="bold" style:font-name-complex="Arial2" style:font-weight-complex="bold"/>
    </style:style>
    <style:style style:name="T6" style:family="text">
      <style:text-properties fo:color="#1f4e79" loext:opacity="100%" style:font-name="Arial" fo:font-weight="bold" officeooo:rsid="00160d47" style:font-name-asian="Arial2" style:font-weight-asian="bold" style:font-name-complex="Arial2" style:font-weight-complex="bold"/>
    </style:style>
    <style:style style:name="T7" style:family="text">
      <style:text-properties fo:color="#1f4e79" loext:opacity="100%" style:font-name="Arial" fo:font-size="40pt" fo:font-weight="bold" style:font-name-asian="Arial2" style:font-size-asian="40pt" style:font-weight-asian="bold" style:font-name-complex="Arial2" style:font-size-complex="40pt" style:font-weight-complex="bold"/>
    </style:style>
    <style:style style:name="T8" style:family="text">
      <style:text-properties fo:color="#2e75b6" loext:opacity="100%" style:font-name="Arial" fo:font-size="18pt" fo:font-style="italic" style:font-name-asian="Arial2" style:font-size-asian="18pt" style:font-style-asian="italic" style:font-name-complex="Arial2" style:font-size-complex="18pt" style:font-style-complex="italic"/>
    </style:style>
    <style:style style:name="T9" style:family="text">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T10" style:family="text">
      <style:text-properties fo:color="#2e75b6" loext:opacity="100%" style:font-name="Arial" fo:font-size="13pt" fo:font-weight="bold" officeooo:rsid="0019a84f" style:font-name-asian="Arial2" style:font-size-asian="13pt" style:font-weight-asian="bold" style:font-name-complex="Arial2" style:font-size-complex="13pt" style:font-weight-complex="bold"/>
    </style:style>
    <style:style style:name="T11" style:family="text">
      <style:text-properties fo:color="#2e75b6" loext:opacity="100%" style:font-name="Arial" fo:font-size="13pt" fo:font-weight="bold" officeooo:rsid="001ad30f" style:font-name-asian="Arial2" style:font-size-asian="13pt" style:font-weight-asian="bold" style:font-name-complex="Arial2" style:font-size-complex="13pt" style:font-weight-complex="bold"/>
    </style:style>
    <style:style style:name="T12" style:family="text">
      <style:text-properties fo:color="#2e75b6" loext:opacity="100%" style:font-name="Arial" fo:font-style="italic" style:font-name-asian="Arial2" style:font-style-asian="italic" style:font-name-complex="Arial2" style:font-style-complex="italic"/>
    </style:style>
    <style:style style:name="T13" style:family="text">
      <style:text-properties fo:color="#404040" loext:opacity="100%" style:font-name="Arial" fo:font-size="11pt" style:font-name-asian="Arial2" style:font-size-asian="11pt" style:font-name-complex="Arial2" style:font-size-complex="11pt"/>
    </style:style>
    <style:style style:name="T14" style:family="text">
      <style:text-properties fo:color="#404040" loext:opacity="100%" style:font-name="Arial" fo:font-size="11pt" officeooo:rsid="0018d789" style:font-name-asian="Arial2" style:font-size-asian="11pt" style:font-name-complex="Arial2" style:font-size-complex="11pt"/>
    </style:style>
    <style:style style:name="T15" style:family="text">
      <style:text-properties fo:color="#404040" loext:opacity="100%" style:font-name="Arial" fo:font-size="10pt" fo:font-style="italic" style:font-name-asian="Arial2" style:font-size-asian="10pt" style:font-style-asian="italic" style:font-name-complex="Arial2" style:font-size-complex="10pt" style:font-style-complex="italic"/>
    </style:style>
    <style:style style:name="T16" style:family="text">
      <style:text-properties fo:color="#404040" loext:opacity="100%" style:font-name="Arial" fo:font-size="10pt" style:font-name-asian="Arial2" style:font-size-asian="10pt" style:font-name-complex="Arial2" style:font-size-complex="10pt"/>
    </style:style>
    <style:style style:name="T17" style:family="text">
      <style:text-properties fo:color="#404040" loext:opacity="100%" style:font-name="Arial" style:font-name-asian="Arial2" style:font-name-complex="Arial2"/>
    </style:style>
    <style:style style:name="T18"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9" style:family="text">
      <style:text-properties fo:color="#c7254e" loext:opacity="100%" style:font-name="Courier New" fo:font-size="10pt" style:font-name-asian="Courier New1" style:font-size-asian="10pt" style:font-name-complex="Courier New1" style:font-size-complex="10pt"/>
    </style:style>
    <style:style style:name="T20" style:family="text">
      <style:text-properties fo:color="#333333" loext:opacity="100%" style:font-name="Courier New" fo:font-size="9pt" style:font-name-asian="Courier New1" style:font-size-asian="9pt" style:font-name-complex="Courier New1" style:font-size-complex="9pt"/>
    </style:style>
    <style:style style:name="T21" style:family="text">
      <style:text-properties fo:color="#888888" loext:opacity="100%" style:font-name="Arial" fo:font-size="9pt" style:font-name-asian="Arial2" style:font-size-asian="9pt" style:font-name-complex="Arial2" style:font-size-complex="9pt"/>
    </style:style>
    <style:style style:name="T22" style:family="text">
      <style:text-properties fo:color="#888888" loext:opacity="100%" style:font-name="Arial" fo:font-size="9pt" officeooo:rsid="00160d47" style:font-name-asian="Arial2" style:font-size-asian="9pt" style:font-name-complex="Arial2" style:font-size-complex="9pt"/>
    </style:style>
    <style:style style:name="T23" style:family="text">
      <style:text-properties fo:color="#888888" loext:opacity="100%" style:font-name="Arial" fo:font-size="9pt" officeooo:rsid="0017131d" style:font-name-asian="Arial2" style:font-size-asian="9pt" style:font-name-complex="Arial2"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text:p>
      <text:p text:style-name="P7"><text:span text:style-name="T7"/></text:p>
      <text:p text:style-name="P7"><text:span text:style-name="T7"/></text:p>
      <text:p text:style-name="P7"><text:span text:style-name="T7">Rapport de projet</text:span></text:p>
      <text:p text:style-name="P7"><text:span text:style-name="T7"/></text:p>
      <text:p text:style-name="P7"><text:span text:style-name="T7"/></text:p>
      <text:p text:style-name="P8"><text:span text:style-name="T8"/></text:p>
      <text:p text:style-name="P15"><text:span text:style-name="T12">Réalisation d'une IA pour le jeu Breakthrough</text:span></text:p>
      <text:p text:style-name="P15"><text:span text:style-name="T12"/></text:p>
      <text:p text:style-name="P16"><text:span text:style-name="T17">Intelligence Artificielle - L2 Informatique</text:span></text:p>
      <text:p text:style-name="P16"><text:span text:style-name="T17"/></text:p>
      <text:p text:style-name="P16"><text:span text:style-name="T17">Université de Lorraine – 2025-2026</text:span></text:p>
      <text:p text:style-name="P16"><text:span text:style-name="T17"/></text:p>
      <text:p text:style-name="P16"><text:span text:style-name="T17"/></text:p>
      <text:p text:style-name="P17"><text:span text:style-name="T4">Jules </text:span><text:span text:style-name="T5">Tiburce</text:span><text:span text:style-name="T4"> </text:span><text:span text:style-name="T6">Hinson</text:span></text:p>
      <text:p text:style-name="Standard"/>
      <text:h text:style-name="P1" text:outline-level="1"><text:span text:style-name="T1">Introduction</text:span></text:h>
      <text:p text:style-name="P10"><text:span text:style-name="T13">Ce rapport présente la réalisation du projet de TP d'intelligence artificielle : programmer le jeu Breakthrough et y intégrer une IA. J'ai construit le projet par étapes - représentation du jeu, validation des coups, génération des successeurs, Minimax, Alpha-Beta, fonctions d'évaluation et Monte-Carlo, en testant chaque composant séparément avant de passer à la suite.</text:span></text:p>
      <text:p text:style-name="P12"/>
      <text:h text:style-name="P2" text:outline-level="1"><text:span text:style-name="T1">1. Présentation générale du projet</text:span></text:h>
      <text:p text:style-name="P10"><text:span text:style-name="T13">Breakthrough est un jeu à deux joueurs sur un plateau 8×8. Le joueur blanc avance vers les lignes hautes, le joueur noir vers les lignes basses. Un pion peut avancer tout droit si la case est vide, ou en diagonale pour capturer un pion adverse. L'objectif est d'atteindre l'autre côté du plateau avant l'adversaire.</text:span></text:p>
      <text:p text:style-name="P10"><text:span text:style-name="T13">Le projet final propose trois modes de jeu (Humain/Humain, Humain/IA, IA/IA) et trois fonctions d'évaluation : naïve, Booster et Monte-Carlo. Un menu principal permet de configurer la profondeur de recherche et le type d'évaluation.</text:span></text:p>
      <text:p text:style-name="P12"/>
      <text:h text:style-name="P2" text:outline-level="1"><text:span text:style-name="T1">2. Organisation du projet</text:span></text:h>
      <text:p text:style-name="P10"><text:span text:style-name="T13">Le projet est structuré en quatre packages et une classe principale :</text:span></text:p>
      <text:p text:style-name="P12"/>
      <table:table table:name="Tableau1" table:style-name="Tableau1">
        <table:table-column table:style-name="Tableau1.A"/>
        <table:table-column table:style-name="Tableau1.B"/>
        <table:table-row table:style-name="Tableau1.1">
          <table:table-cell table:style-name="Tableau1.A1" office:value-type="string">
            <text:p text:style-name="P9"><text:span text:style-name="T18">Etat</text:span></text:p>
          </table:table-cell>
          <table:table-cell table:style-name="Tableau1.B1" office:value-type="string">
            <text:p text:style-name="Standard"><text:span text:style-name="T15">Logique du jeu : EtatJeu, Plateau, Case, Joueur, Action, Gagnant, IA (Minimax + AlphaBeta)</text:span></text:p>
          </table:table-cell>
        </table:table-row>
      </table:table>
      <text:p text:style-name="P12"/>
      <table:table table:name="Tableau2" table:style-name="Tableau2">
        <table:table-column table:style-name="Tableau2.A"/>
        <table:table-column table:style-name="Tableau2.B"/>
        <table:table-row table:style-name="Tableau2.1">
          <table:table-cell table:style-name="Tableau2.A1" office:value-type="string">
            <text:p text:style-name="P9"><text:span text:style-name="T18">Evaluations</text:span></text:p>
          </table:table-cell>
          <table:table-cell table:style-name="Tableau2.B1" office:value-type="string">
            <text:p text:style-name="Standard"><text:span text:style-name="T15">Interface Evaluation + implémentations : EvaluationNaive, EvaluationBooster, EvaluationMonteCarlo, ComparateurIA</text:span></text:p>
          </table:table-cell>
        </table:table-row>
      </table:table>
      <text:p text:style-name="P12"/>
      <table:table table:name="Tableau3" table:style-name="Tableau3">
        <table:table-column table:style-name="Tableau3.A"/>
        <table:table-column table:style-name="Tableau3.B"/>
        <table:table-row table:style-name="Tableau3.1">
          <table:table-cell table:style-name="Tableau3.A1" office:value-type="string">
            <text:p text:style-name="P9"><text:span text:style-name="T18">Option</text:span></text:p>
          </table:table-cell>
          <table:table-cell table:style-name="Tableau3.B1" office:value-type="string">
            <text:p text:style-name="Standard"><text:span text:style-name="T15">Modes de jeu en console : Breakthrough, BreakthroughIA, BreakthroughHumainVSIA</text:span></text:p>
          </table:table-cell>
        </table:table-row>
      </table:table>
      <text:p text:style-name="P12"/>
      <table:table table:name="Tableau4" table:style-name="Tableau4">
        <table:table-column table:style-name="Tableau4.A"/>
        <table:table-column table:style-name="Tableau4.B"/>
        <table:table-row table:style-name="Tableau4.1">
          <table:table-cell table:style-name="Tableau4.A1" office:value-type="string">
            <text:p text:style-name="P9"><text:span text:style-name="T18">Tests</text:span></text:p>
          </table:table-cell>
          <table:table-cell table:style-name="Tableau4.B1" office:value-type="string">
            <text:p text:style-name="Standard"><text:span text:style-name="T15">11 classes de tests : AfficherPlateau, CoupValide, Successeur, Successeurs, TestMiniMax, TestAlphaBeta, TestEvaluationNaive, TestEvaluationBooster, TestEvaluationMonteCarlo, TestComparaisonEval, TestTempsComparaison</text:span></text:p>
          </table:table-cell>
        </table:table-row>
      </table:table>
      <text:p text:style-name="P12"/>
      <table:table table:name="Tableau5" table:style-name="Tableau5">
        <table:table-column table:style-name="Tableau5.A"/>
        <table:table-column table:style-name="Tableau5.B"/>
        <table:table-row table:style-name="Tableau5.1">
          <table:table-cell table:style-name="Tableau5.A1" office:value-type="string">
            <text:p text:style-name="P9"><text:span text:style-name="T18">Main</text:span></text:p>
          </table:table-cell>
          <table:table-cell table:style-name="Tableau5.B1" office:value-type="string">
            <text:p text:style-name="Standard"><text:span text:style-name="T15">MainMenuBreakthrough : point d'entrée, menu interactif en console</text:span></text:p>
          </table:table-cell>
        </table:table-row>
      </table:table>
      <text:p text:style-name="P12"/>
      <text:p text:style-name="P12"><draw:frame draw:style-name="fr1" draw:name="Image1" text:anchor-type="char" svg:width="17cm" svg:height="16.302cm" draw:z-index="0"><draw:image xlink:href="Pictures/10000001000002AB0000028FB505EDA1.png" xlink:type="simple" xlink:show="embed" xlink:actuate="onLoad" draw:mime-type="image/png"/></draw:frame><text:soft-page-break/></text:p>
      <text:h text:style-name="P2" text:outline-level="1"><text:span text:style-name="T1">3. Modélisation de l'état du jeu</text:span></text:h>
      <text:p text:style-name="P10"><text:span text:style-name="T13">Un état contient le plateau et le joueur qui doit jouer. Chaque position possible est un état au sens du cours, et chaque action valide permet de passer d'un état à un autre. Les pions blancs sont notés B, les noirs N.</text:span></text:p>
      <text:h text:style-name="P3" text:outline-level="2"><text:span text:style-name="T9">Test : AfficherPlateau</text:span></text:h>
      <text:p text:style-name="P10"><text:span text:style-name="T13">J'ai vérifié que le constructeur EtatJeu(8) créait bien le plateau initial avec les pions aux bonnes positions. Ce test est fondamental : un état initial incorrect invalide toutes les étapes suivantes.</text:span></text:p>
      <text:p text:style-name="P12"/>
      <text:h text:style-name="P2" text:outline-level="1"><text:span text:style-name="T1">4. Représentation et validation des actions</text:span></text:h>
      <text:p text:style-name="P10"><text:span text:style-name="T13">Une action est un triplet (ligne, colonne, direction). La direction vaut -1, 0 ou 1 pour les déplacements diagonaux et tout droit. La méthode actionValide vérifie : la direction, que la case de </text:span><text:soft-page-break/><text:span text:style-name="T13">départ contient bien un pion du joueur, et que le déplacement respecte les règles (tout droit si la case est vide, diagonal uniquement pour capturer).</text:span></text:p>
      <text:h text:style-name="P3" text:outline-level="2"><text:span text:style-name="T9">Test : CoupValide</text:span></text:h>
      <text:p text:style-name="P10"><text:span text:style-name="T13">J'ai testé l'action </text:span><text:span text:style-name="T19">(1, 0, 0)</text:span><text:span text:style-name="T13"> pour le joueur blanc depuis l'état initial - résultat attendu : </text:span><text:span text:style-name="T19">true</text:span><text:span text:style-name="T13">. J'ai aussi testé un déplacement diagonal hors du plateau - résultat attendu : </text:span><text:span text:style-name="T19">false</text:span><text:span text:style-name="T13">.</text:span></text:p>
      <text:p text:style-name="P12"/>
      <text:h text:style-name="P2" text:outline-level="1"><text:span text:style-name="T1">5. Calcul d'un successeur</text:span></text:h>
      <text:p text:style-name="P10"><text:span text:style-name="T13">La méthode successeur crée une copie de l'état courant, déplace le pion, puis change le joueur. Travailler sur une copie est essentiel : l'IA doit explorer plusieurs coups sans modifier la position de départ.</text:span></text:p>
      <text:h text:style-name="P3" text:outline-level="2"><text:span text:style-name="T9">Test : Successeur</text:span></text:h>
      <text:p text:style-name="P10"><text:span text:style-name="T13">J'ai affiché le plateau avant et après un coup. J'ai vérifié qu'un seul pion avait bougé, que l'ancienne case était vide, et que le tour avait changé. Ce test a évité une erreur classique : modifier l'état courant au lieu d'en créer un nouveau.</text:span></text:p>
      <text:p text:style-name="P12"/>
      <text:h text:style-name="P2" text:outline-level="1"><text:span text:style-name="T1">6. Génération de tous les successeurs</text:span></text:h>
      <text:p text:style-name="P10"><text:span text:style-name="T13">La méthode successeurs parcourt le plateau, teste les trois directions pour chaque pion du joueur courant, et retourne la liste de tous les états accessibles.</text:span></text:p>
      <text:h text:style-name="P3" text:outline-level="2"><text:span text:style-name="T9">Bug corrigé</text:span></text:h>
      <text:p text:style-name="P10"><text:span text:style-name="T13">Au départ, la liste ne contenait que 7 successeurs au lieu de 8 depuis l'état initial. Le problème venait d'une confusion entre déplacement vertical (dépend du joueur) et déplacement horizontal (dépend de la direction). Correction :</text:span></text:p>
      <text:p text:style-name="P13"><text:span text:style-name="T20">int ligneArrivee <text:s text:c="2"/>= ligneDepart + directionVerticale;</text:span></text:p>
      <text:p text:style-name="P13"><text:span text:style-name="T20">int colonneArrivee = colonneDepart + direction;</text:span></text:p>
      <text:h text:style-name="P3" text:outline-level="2"><text:span text:style-name="T9">Test : Successeurs</text:span></text:h>
      <text:p text:style-name="P10"><text:span text:style-name="T13">Depuis l'état initial, le joueur blanc doit avoir exactement 8 successeurs (un par pion). Après correction, la liste avait bien 8 éléments. J'ai aussi affiché chaque successeur pour vérifier visuellement qu'un seul pion bougeait à chaque fois.</text:span></text:p>
      <text:p text:style-name="P12"/>
      <text:h text:style-name="P2" text:outline-level="1"><text:span text:style-name="T1">7. Jeu humain contre humain</text:span></text:h>
      <text:p text:style-name="P10"><text:span text:style-name="T13">J'ai mis en place un mode de jeu en console où l'utilisateur saisit (ligne, colonne, direction). Le programme valide l'action et refuse les coups invalides avec un message explicite. Ce mode a permis de valider manuellement les règles avant d'implémenter l'IA.</text:span></text:p>
      <text:h text:style-name="P3" text:outline-level="2"><text:span text:style-name="T9">Tests : Breakthrough </text:span><text:span text:style-name="T10">(Package Option)</text:span></text:h>
      <text:p text:style-name="P10"><text:span text:style-name="T13">J'ai testé des coups valides, puis volontairement des coups invalides : hors plateau, diagonal sans capture, case vide, pion adverse. Tous ont été correctement refusés.</text:span></text:p>
      <text:p text:style-name="P12"><text:soft-page-break/></text:p>
      <text:h text:style-name="P2" text:outline-level="1"><text:span text:style-name="T1">8. Fonction d'évaluation naïve (eval0), </text:span><text:span text:style-name="T2">temps et IA</text:span></text:h>
      <text:p text:style-name="P10"><text:span text:style-name="T13">L'évaluation naïve calcule </text:span><text:span text:style-name="T19">nbPionsJoueur - nbPionsAdversaire</text:span><text:span text:style-name="T13">. Simple et rapide, elle sert de base pour Minimax. Sa limite : elle ignore complètement la position des pions. Un pion à un coup de la victoire vaut autant qu'un pion au départ.</text:span></text:p>
      <text:h text:style-name="P3" text:outline-level="2"><text:span text:style-name="T9">Test : TestEvaluationNaive</text:span></text:h>
      <text:p text:style-name="P10"><text:span text:style-name="T13">Depuis l'état initial, le score est 0 pour les deux joueurs (même nombre de pions). Après une capture simulée, le joueur avec plus de pions obtient un score positif. Résultats conformes.</text:span></text:p>
      <text:h text:style-name="P4" text:outline-level="2"><text:span text:style-name="T9">Tests : Breakthrough</text:span><text:span text:style-name="T10">HumainVSIA</text:span><text:span text:style-name="T9"> </text:span><text:span text:style-name="T10">(Package Option)</text:span></text:h>
      <text:p text:style-name="P18"><text:span text:style-name="T13">L’évaluation naïve a aussi été testée dans une partie humain contre IA. Dans ce mode, l’humain joue contre une IA utilisant Minimax ou Alpha-Beta avec cette fonction d’évaluation.</text:span></text:p>
      <text:p text:style-name="Text_20_body">Le test a permis de vérifier que l’IA choisissait bien un coup valide à chaque tour. Cependant, son comportement reste assez simple. L’IA cherche surtout à éviter de perdre des pions ou à capturer ceux de l’adversaire. Elle ne cherche pas forcément à avancer rapidement vers la ligne d’arrivée, car l’évaluation naïve ne valorise pas la progression.</text:p>
      <text:h text:style-name="P4" text:outline-level="2"><text:span text:style-name="T10">Tests : BreakthroughIA (Package Option)</text:span></text:h>
      <text:p text:style-name="Text_20_body">Un autre test a été réalisé en mode IA contre IA. Ce test est utile parce qu’il permet d’observer le comportement de l’évaluation naïve sur une partie complète, sans intervention humaine.</text:p>
      <text:p text:style-name="Text_20_body">Dans ce mode, les deux IA jouent automatiquement. Lorsque l’évaluation naïve est utilisée, les décisions sont cohérentes mais peu stratégiques. L’IA privilégie surtout les positions où elle garde un bon nombre de pions. Elle peut donc parfois rater des coups importants liés à l’avancement.</text:p>
      <text:p text:style-name="P5"><text:span text:style-name="T11">Mesure du t</text:span><text:span text:style-name="T9">emps </text:span><text:span text:style-name="T11">de calcul</text:span><text:span text:style-name="T9">:</text:span></text:p>
      <text:p text:style-name="Text_20_body">Le calcul du temps d’exécution a été ajouté dans toutes les parties où l’IA prend une décision. L’objectif est de mesurer précisément le coût des algorithmes utilisés, en particulier Minimax et Alpha-Beta, lorsqu’ils évaluent un coup.</text:p>
      <text:p text:style-name="Text_20_body">Pour cela, le temps est mesuré avant et après l’appel à l’algorithme de recherche. La différence entre ces deux instants permet d’obtenir la durée de calcul nécessaire pour déterminer le meilleur coup.</text:p>
      <text:p text:style-name="Text_20_body">Le temps est exprimé sous deux formats :</text:p>
      <text:list text:style-name="L3">
        <text:list-item>
          <text:p text:style-name="P20">en nanosecondes, pour une mesure très précise, </text:p>
        </text:list-item>
        <text:list-item>
          <text:p text:style-name="P19">en millisecondes, pour une lecture plus compréhensible. </text:p>
        </text:list-item>
      </text:list>
      <text:p text:style-name="Text_20_body">Cette mesure est centralisée dans une méthode spécifique située dans la classe principale. Cette méthode a un double rôle : elle affiche le temps de calcul et renvoie l’état du jeu correspondant au meilleur coup trouvé par l’IA.</text:p>
      <text:p text:style-name="Text_20_body">Ces mesures ont permis de comparer concrètement les performances des différentes approches. Elles montrent notamment que le temps de calcul augmente rapidement avec la profondeur de recherche, et que l’algorithme Alpha-Beta est plus efficace que Minimax en réduisant le nombre de positions explorées.</text:p>
      <text:p text:style-name="Text_20_body"><text:soft-page-break/>Ainsi, l’ajout de cette mesure a permis non seulement de valider le fonctionnement des algorithmes, mais aussi d’analyser leur coût réel en situation d’exécution.</text:p>
      <text:h text:style-name="P2" text:outline-level="1"><text:span text:style-name="T1">9. Alg</text:span><text:span text:style-name="T3">o</text:span><text:span text:style-name="T1">rithme Minimax</text:span></text:h>
      <text:p text:style-name="P10"><text:span text:style-name="T13">Minimax explore l'arbre des coups jusqu'à une profondeur limite. L'IA maximise son score, l'adversaire le minimise, on suppose que les deux jouent de façon optimale. En profondeur 0, l'algorithme appelle eval0 pour noter la position.</text:span></text:p>
      <text:h text:style-name="P3" text:outline-level="2"><text:span text:style-name="T9">Test : TestMiniMax</text:span></text:h>
      <text:p text:style-name="P10"><text:span text:style-name="T13">J'ai lancé Minimax avec une profondeur de 1 depuis l'état initial : le programme choisit un coup valide sans planter. En augmentant progressivement la profondeur (1, 2, 3), j'ai observé que le temps de calcul augmente fortement, ce qui est cohérent avec la complexité.</text:span></text:p>
      <text:p text:style-name="P18"><text:span text:style-name="T14">-</text:span><text:span text:style-name="T13">Complexité Minimax : </text:span><text:span text:style-name="Strong_20_Emphasis"><text:span text:style-name="T13">O(b^d)</text:span></text:span><text:span text:style-name="T13"> </text:span></text:p>
      <text:p text:style-name="P12"/>
      <text:h text:style-name="P2" text:outline-level="1"><text:span text:style-name="T1">10. Élagage Alpha-Beta</text:span></text:h>
      <text:p text:style-name="P10"><text:span text:style-name="T13">Alpha-Beta produit le même résultat que Minimax mais évite d'explorer les branches inutiles grâce à deux bornes α et β. Quand α ≥ β, l'exploration de la branche s'arrête. Le gain en temps devient significatif à partir de la profondeur 3.</text:span></text:p>
      <text:h text:style-name="P3" text:outline-level="2"><text:span text:style-name="T9">Test : TestTempsComparaison</text:span></text:h>
      <text:p text:style-name="P10"><text:span text:style-name="T13">J'ai mesuré le temps de calcul avec System.nanoTime pour les deux algorithmes. À profondeur 1, la différence est négligeable. À profondeur 3 et au-delà, Alpha-Beta est nettement plus rapide, ce qui confirme l'intérêt de l'élagage.</text:span></text:p>
      <text:p text:style-name="P11"><text:span text:style-name="T13">-Alpha-Beta : </text:span><text:span text:style-name="Strong_20_Emphasis"><text:span text:style-name="T13">≈ O(b^(d/2)) dans le meilleur cas</text:span></text:span></text:p>
      <text:p text:style-name="P12"/>
      <text:h text:style-name="P2" text:outline-level="1"><text:span text:style-name="T1">11. Évaluation Booster</text:span></text:h>
      <text:p text:style-name="P10"><text:span text:style-name="T13">L'évaluation Booster améliore la naïve en ajoutant un bonus d'avancement. Chaque pion vaut 10 points de base, plus un bonus proportionnel à sa progression sur le plateau : les lignes hautes pour Blanc, les lignes basses pour Noir.</text:span></text:p>
      <text:p text:style-name="P13"><text:span text:style-name="T20">if (j == Joueur.joueurBlanc) { score += 10 + i; }</text:span></text:p>
      <text:p text:style-name="P13"><text:span text:style-name="T20">else <text:s text:c="24"/>{ score += 10 + (7 - i); }</text:span></text:p>
      <text:p text:style-name="P10"><text:span text:style-name="T13">L'idée vient du jeu lui-même : dans Breakthrough, l'objectif est d'avancer. Un pion proche de la ligne adverse est bien plus dangereux qu'un pion au départ. La naïve l'ignore complètement.</text:span></text:p>
      <text:h text:style-name="P3" text:outline-level="2"><text:span text:style-name="T9">Test : TestEvaluationBooster</text:span></text:h>
      <text:p text:style-name="P10"><text:span text:style-name="T13">J'ai fait jouer une IA Booster contre une IA Naive en IA/IA. Booster jouait mieux et avançait plus vite. Ce test a motivé la comparaison systématique avec ComparateurIA.</text:span></text:p>
      <text:p text:style-name="P12"/>
      <text:h text:style-name="P2" text:outline-level="1"><text:soft-page-break/><text:span text:style-name="T1">12. Méthode Monte-Carlo</text:span></text:h>
      <text:p text:style-name="P10"><text:span text:style-name="T13">Monte-Carlo estime la probabilité de victoire depuis un état en simulant plusieurs parties aléatoires. La formule du cours est appliquée directement :</text:span></text:p>
      <text:p text:style-name="P13"><text:span text:style-name="T20">p <text:s text:c="4"/>= victoires / nombreSimulations</text:span></text:p>
      <text:p text:style-name="P13"><text:span text:style-name="T20">valeur = 2 * p - 1 <text:s text:c="7"/>// dans [-1, +1], multiplié par 100 pour Minimax</text:span></text:p>
      <text:p text:style-name="P12"/>
      <text:h text:style-name="P3" text:outline-level="2"><text:span text:style-name="T9">Bug critique : copie() ne copiait pas tourBlanc</text:span></text:h>
      <text:p text:style-name="P10"><text:span text:style-name="T13">Le bug le plus important du projet se trouvait dans la méthode copie() de EtatJeu. Le champ tourBlanc n'était pas copié : le constructeur EtatJeu(largeur) initialise toujours tourBlanc = true. Résultat : toutes les simulations repartaient avec le joueur Blanc, même quand c'était au tour du Noir — faussant entièrement les estimations de probabilité.</text:span></text:p>
      <text:p text:style-name="P10"><text:span text:style-name="T13">Correction : une seule ligne ajoutée dans copie() :</text:span></text:p>
      <text:p text:style-name="P13"><text:span text:style-name="T20">copie.tourBlanc = this.tourBlanc;</text:span></text:p>
      <text:p text:style-name="P10"><text:span text:style-name="T13">Ce bug affectait aussi Minimax et AlphaBeta qui utilisent copie() via successeurs(). La correction a bénéficié à l'ensemble du projet.</text:span></text:p>
      <text:p text:style-name="P12"/>
      <text:h text:style-name="P3" text:outline-level="2"><text:span text:style-name="T9">Gestion du joueur courant dans les simulations</text:span></text:h>
      <text:p text:style-name="P10"><text:span text:style-name="T13">Deuxième problème : il ne faut pas alterner manuellement les joueurs pendant une simulation. Chaque successeur met déjà à jour le tour. Le joueur courant doit être lu directement depuis l'état :</text:span></text:p>
      <text:p text:style-name="P13"><text:span text:style-name="T20">Joueur joueurCourant = copie.getTourBlanc() ? Joueur.joueurBlanc : Joueur.joueurNoir;</text:span></text:p>
      <text:p text:style-name="P12"/>
      <text:h text:style-name="P3" text:outline-level="2"><text:span text:style-name="T9">Tests : TestEvaluationMonteCarlo</text:span></text:h>
      <text:p text:style-name="P10"><text:span text:style-name="T13">Un test de diagnostic a simulé 20 parties depuis l'état initial avec une limite de 150 coups. Résultat : toutes les 20 parties avaient un gagnant, en 43 à 93 coups. Les simulations fonctionnent correctement.</text:span></text:p>
      <text:p text:style-name="P10"><text:span text:style-name="T13">En revanche, un test sur des feuilles à profondeur 2 a révélé une variance très élevée : sur la même feuille, cinq appels successifs retournaient des scores allant de -6 à +13 avec 100 simulations. C'est trop bruité pour que l'AlphaBeta prenne des décisions fiables.</text:span></text:p>
      <text:p text:style-name="P12"/>
      <text:h text:style-name="P2" text:outline-level="1"><text:span text:style-name="T1">13. Comparaison automatique des évaluations</text:span></text:h>
      <text:p text:style-name="P10"><text:span text:style-name="T13">ComparateurIA fait jouer deux évaluations l'une contre l'autre en deux parties (rôles inversés). Pour qu'A soit meilleure que B, A doit gagner les deux parties. La méthode comparer retourne 2 (A gagne), 1 (égalité), ou 0 (B gagne).</text:span></text:p>
      <text:p text:style-name="P12"/>
      <text:h text:style-name="P3" text:outline-level="2"><text:span text:style-name="T9">Booster contre Naive</text:span></text:h>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9"><text:span text:style-name="T18">Profondeur</text:span></text:p>
            </table:table-cell>
            <table:table-cell table:style-name="Tableau6.A1" office:value-type="string">
              <text:p text:style-name="P9"><text:span text:style-name="T18">Résultat</text:span></text:p>
            </table:table-cell>
            <table:table-cell table:style-name="Tableau6.A1" office:value-type="string">
              <text:p text:style-name="P9"><text:span text:style-name="T18">Interprétation</text:span></text:p>
            </table:table-cell>
          </table:table-row>
        </table:table-header-rows>
        <table:table-row table:style-name="Tableau6.1">
          <table:table-cell table:style-name="Tableau6.A2" office:value-type="string">
            <text:p text:style-name="Standard"><text:span text:style-name="T16">1</text:span></text:p>
          </table:table-cell>
          <table:table-cell table:style-name="Tableau6.A2" office:value-type="string">
            <text:p text:style-name="Standard"><text:span text:style-name="T16">1/2 - égalité</text:span></text:p>
          </table:table-cell>
          <table:table-cell table:style-name="Tableau6.A2" office:value-type="string">
            <text:p text:style-name="Standard"><text:span text:style-name="T16">Un coup ne suffit pas à exploiter le bonus </text:span><text:soft-page-break/><text:span text:style-name="T16">d'avancement</text:span></text:p>
          </table:table-cell>
        </table:table-row>
        <table:table-row table:style-name="Tableau6.1">
          <table:table-cell table:style-name="Tableau6.A3" office:value-type="string">
            <text:p text:style-name="Standard"><text:span text:style-name="T16">2</text:span></text:p>
          </table:table-cell>
          <table:table-cell table:style-name="Tableau6.A3" office:value-type="string">
            <text:p text:style-name="Standard"><text:span text:style-name="T16">2/2 - Booster gagne</text:span></text:p>
          </table:table-cell>
          <table:table-cell table:style-name="Tableau6.A3" office:value-type="string">
            <text:p text:style-name="Standard"><text:span text:style-name="T16">Le bonus positionnel fait la différence</text:span></text:p>
          </table:table-cell>
        </table:table-row>
        <table:table-row table:style-name="Tableau6.1">
          <table:table-cell table:style-name="Tableau6.A2" office:value-type="string">
            <text:p text:style-name="Standard"><text:span text:style-name="T16">3</text:span></text:p>
          </table:table-cell>
          <table:table-cell table:style-name="Tableau6.A2" office:value-type="string">
            <text:p text:style-name="Standard"><text:span text:style-name="T16">2/2 - Booster gagne</text:span></text:p>
          </table:table-cell>
          <table:table-cell table:style-name="Tableau6.A2" office:value-type="string">
            <text:p text:style-name="Standard"><text:span text:style-name="T16">Avantage confirmé avec plus de recul</text:span></text:p>
          </table:table-cell>
        </table:table-row>
        <table:table-row table:style-name="Tableau6.1">
          <table:table-cell table:style-name="Tableau6.A3" office:value-type="string">
            <text:p text:style-name="Standard"><text:span text:style-name="T16">2 (rôles inversés)</text:span></text:p>
          </table:table-cell>
          <table:table-cell table:style-name="Tableau6.A3" office:value-type="string">
            <text:p text:style-name="Standard"><text:span text:style-name="T16">2/2 - Booster gagne</text:span></text:p>
          </table:table-cell>
          <table:table-cell table:style-name="Tableau6.A3" office:value-type="string">
            <text:p text:style-name="Standard"><text:span text:style-name="T16">Indépendant de la couleur jouée</text:span></text:p>
          </table:table-cell>
        </table:table-row>
      </table:table>
      <text:p text:style-name="P12"/>
      <text:p text:style-name="P10"><text:span text:style-name="T13">Booster &gt; Naive à partir de la profondeur 2. À profondeur 1, les deux évaluations sont équivalentes car un seul coup ne suffit pas à exploiter l'information positionnelle.</text:span></text:p>
      <text:p text:style-name="P12"/>
      <text:h text:style-name="P3" text:outline-level="2"><text:span text:style-name="T9">Monte-Carlo contre Naive et Booster</text:span></text:h>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9"><text:span text:style-name="T18">Comparaison</text:span></text:p>
            </table:table-cell>
            <table:table-cell table:style-name="Tableau7.A1" office:value-type="string">
              <text:p text:style-name="P9"><text:span text:style-name="T18">Paramètres</text:span></text:p>
            </table:table-cell>
            <table:table-cell table:style-name="Tableau7.A1" office:value-type="string">
              <text:p text:style-name="P9"><text:span text:style-name="T18">Résultat</text:span></text:p>
            </table:table-cell>
          </table:table-row>
        </table:table-header-rows>
        <table:table-row table:style-name="Tableau7.1">
          <table:table-cell table:style-name="Tableau7.A2" office:value-type="string">
            <text:p text:style-name="Standard"><text:span text:style-name="T16">Monte-Carlo vs Naive</text:span></text:p>
          </table:table-cell>
          <table:table-cell table:style-name="Tableau7.A2" office:value-type="string">
            <text:p text:style-name="Standard"><text:span text:style-name="T16">100 simulations, limiteCoups=80</text:span></text:p>
          </table:table-cell>
          <table:table-cell table:style-name="Tableau7.A2" office:value-type="string">
            <text:p text:style-name="Standard"><text:span text:style-name="T16">0/2 - Naive gagne</text:span></text:p>
          </table:table-cell>
        </table:table-row>
        <table:table-row table:style-name="Tableau7.1">
          <table:table-cell table:style-name="Tableau7.A3" office:value-type="string">
            <text:p text:style-name="Standard"><text:span text:style-name="T16">Monte-Carlo vs Booster</text:span></text:p>
          </table:table-cell>
          <table:table-cell table:style-name="Tableau7.A3" office:value-type="string">
            <text:p text:style-name="Standard"><text:span text:style-name="T16">100 simulations, limiteCoups=80</text:span></text:p>
          </table:table-cell>
          <table:table-cell table:style-name="Tableau7.A3" office:value-type="string">
            <text:p text:style-name="Standard"><text:span text:style-name="T16">0/2 - Booster gagne</text:span></text:p>
          </table:table-cell>
        </table:table-row>
      </table:table>
      <text:p text:style-name="P12"/>
      <text:p text:style-name="P10"><text:span text:style-name="T13">Monte-Carlo perd contre les deux autres. Les parties de Breakthrough durent ~70 coups en moyenne, ce qui rend chaque simulation coûteuse. À profondeur 2, l'AlphaBeta appelle eval sur ~400 feuilles, soit 40 000 parties simulées par coup. Avec 100 simulations, p reste trop bruité pour discriminer des positions proches.Pour obtenir une estimation fiable, il faut un grand nombre de simulations, ce qui devient incompatible avec Alpha-Beta où eval est appelé un grand nombre de fois.</text:span><text:span text:style-name="T13"/></text:p>
      <text:p text:style-name="P12"/>
      <text:h text:style-name="P3" text:outline-level="2"><text:span text:style-name="T9">Hiérarchie finale</text:span></text:h>
      <table:table table:name="Tableau8" table:style-name="Tableau8">
        <table:table-column table:style-name="Tableau8.A"/>
        <table:table-column table:style-name="Tableau8.B"/>
        <table:table-row table:style-name="Tableau8.1">
          <table:table-cell table:style-name="Tableau8.A1" office:value-type="string">
            <text:p text:style-name="P9"><text:span text:style-name="T18">Résultat</text:span></text:p>
          </table:table-cell>
          <table:table-cell table:style-name="Tableau8.B1" office:value-type="string">
            <text:p text:style-name="Standard"><text:span text:style-name="T15">Booster &gt; Naive &gt; Monte-Carlo dans le contexte de ce projet</text:span></text:p>
          </table:table-cell>
        </table:table-row>
      </table:table>
      <text:p text:style-name="P12"/>
      <text:p text:style-name="P10"><text:span text:style-name="T13">Monte-Carlo est mieux adapté à des jeux avec des parties courtes, ou utilisé sans AlphaBeta. Une heuristique simple mais bien choisie comme Booster surpasse Monte-Carlo quand le temps de calcul est contraint.</text:span></text:p>
      <text:p text:style-name="P12"/>
      <text:h text:style-name="P2" text:outline-level="1"><text:span text:style-name="T1">14. Menu principal</text:span></text:h>
      <text:p text:style-name="P10"><text:span text:style-name="T13">Un menu interactif en console permet de choisir le mode de jeu, la profondeur et l'évaluation. En mode IA/IA, l'évaluation de chaque joueur est configurée séparément. Les saisies invalides sont rejetées avec un message explicite.</text:span></text:p>
      <text:p text:style-name="P12"/>
      <text:h text:style-name="P2" text:outline-level="1"><text:soft-page-break/><text:span text:style-name="T1">15. Problèmes rencontrés et corrections</text:span></text:h>
      <text:list text:style-name="WWNum2">
        <text:list-item text:start-value="1">
          <text:p text:style-name="P6"><text:span text:style-name="T13">Cases null : des vérifications explicites ont été ajoutées avant toute comparaison de cases.</text:span></text:p>
        </text:list-item>
        <text:list-item>
          <text:p text:style-name="P6"><text:span text:style-name="T13">Génération des successeurs : confusion ligne/colonne dans le calcul de la case d'arrivée. Corrigé en séparant clairement directionVerticale (dépend du joueur) et direction (décalage de colonne).</text:span></text:p>
        </text:list-item>
        <text:list-item>
          <text:p text:style-name="P6"><text:span text:style-name="T13">Fin de partie en IA/IA : le programme affichait AUCUN quand un joueur n'avait plus de coups. Corrigé en considérant que le joueur bloqué perd.</text:span></text:p>
        </text:list-item>
        <text:list-item>
          <text:p text:style-name="P6"><text:span text:style-name="T13">Monte-Carlo -- copie() : tourBlanc non copié. Bug le plus critique, corrigé par une seule ligne (voir section 12).</text:span></text:p>
        </text:list-item>
        <text:list-item>
          <text:p text:style-name="P6"><text:span text:style-name="T13">Monte-Carlo -- joueur courant : alternance manuelle remplacée par la lecture de copie.getTourBlanc().</text:span></text:p>
        </text:list-item>
      </text:list>
      <text:p text:style-name="P12"/>
      <text:h text:style-name="P2" text:outline-level="1"><text:span text:style-name="T1">16. Conclusion</text:span></text:h>
      <text:p text:style-name="P10"><text:span text:style-name="T13">Ce projet m'a permis de comprendre concrètement comment une IA de jeu se construit. L'algorithme Minimax n'est que la partie visible : tout repose sur la qualité des états, des successeurs et surtout de la fonction d'évaluation.</text:span></text:p>
      <text:p text:style-name="P10"><text:span text:style-name="T13">Les tests ont confirmé que Booster est la meilleure des trois évaluations dans ce contexte. Monte-Carlo, bien que fidèle à la méthode du cours, se heurte à la longueur des parties de Breakthrough. Une heuristique simple et bien pensée reste plus efficace que des simulations aléatoires coûteuses.</text:span></text:p>
      <text:p text:style-name="P10"><text:span text:style-name="T13">Des améliorations restent possibles : une interface graphique, une évaluation prenant en compte les menaces et les positions bloquées, ou un Monte-Carlo optimisé avec des simulations guidées plutôt que purement aléatoir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404040" loext:opacity="10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404040" loext:opacity="10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635cm" fo:margin-bottom="0.212cm" style:contextual-spacing="false"/>
      <style:text-properties fo:color="#1f4e79"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423cm" fo:margin-bottom="0.141cm"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212cm" style:contextual-spacing="false" fo:text-align="end" style:justify-single-word="false" fo:padding-left="0cm" fo:padding-right="0cm" fo:padding-top="0cm" fo:padding-bottom="0.141cm" fo:border-left="none" fo:border-right="none" fo:border-top="none" fo:border-bottom="0.74pt solid #2e75b6"/>
    </style:style>
    <style:style style:name="MT1" style:family="text">
      <style:text-properties fo:color="#888888" loext:opacity="100%" style:font-name="Arial" fo:font-size="9pt" style:font-name-asian="Arial2" style:font-size-asian="9pt" style:font-name-complex="Arial2" style:font-size-complex="9pt"/>
    </style:style>
    <style:style style:name="MT2" style:family="text">
      <style:text-properties fo:color="#888888" loext:opacity="100%" style:font-name="Arial" fo:font-size="9pt" officeooo:rsid="0017131d" style:font-name-asian="Arial2" style:font-size-asian="9pt" style:font-name-complex="Arial2" style:font-size-complex="9pt"/>
    </style:style>
    <style:style style:name="MT3" style:family="text">
      <style:text-properties fo:color="#888888" loext:opacity="100%" style:font-name="Arial" fo:font-size="9pt" officeooo:rsid="00160d47" style:font-name-asian="Arial2" style:font-size-asian="9pt" style:font-name-complex="Arial2" style:font-size-complex="9pt"/>
    </style:style>
    <style:page-layout style:name="Mpm1">
      <style:page-layout-properties fo:page-width="21.001cm" fo:page-height="29.7cm" style:num-format="1" style:print-orientation="portrait" fo:margin-top="1.249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Rapport Breakthrough -Jules </text:span><text:span text:style-name="MT2">Tiburce</text:span><text:span text:style-name="MT1"> </text:span><text:span text:style-name="MT3">Hinso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4-26T10:09:24.002000000</meta:creation-date>
    <dc:date>2026-04-27T19:40:21.048478565</dc:date>
    <meta:print-date>2026-04-26T13:46:39.250712732</meta:print-date>
    <meta:printed-by>Fichiers PDF</meta:printed-by>
    <meta:editing-duration>P1DT5H47M45S</meta:editing-duration>
    <meta:document-statistic meta:table-count="8" meta:image-count="1" meta:object-count="0" meta:page-count="9" meta:paragraph-count="144" meta:word-count="2275" meta:character-count="14606" meta:non-whitespace-character-count="12440"/>
    <meta:generator>LibreOffice/24.2.7.2$Linux_X86_64 LibreOffice_project/420$Build-2</meta:generator>
  </office:meta>
</office:document-meta>
</file>