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9000000BE7F67F349.png" manifest:media-type="image/png"/>
  <manifest:file-entry manifest:full-path="Pictures/10000001000001E9000000BEDAFB31E7.png" manifest:media-type="image/png"/>
  <manifest:file-entry manifest:full-path="Pictures/10000001000001E9000000BFEDC6FF9E.png" manifest:media-type="image/png"/>
  <manifest:file-entry manifest:full-path="Pictures/10000001000003570000027E29191E5F.png" manifest:media-type="image/png"/>
  <manifest:file-entry manifest:full-path="Pictures/10000001000001E9000000BF7543058A.png" manifest:media-type="image/png"/>
  <manifest:file-entry manifest:full-path="Pictures/10000001000001E0000000BC1E42EE4E.png" manifest:media-type="image/png"/>
  <manifest:file-entry manifest:full-path="Pictures/10000001000001E0000000BCB1BDEE69.png" manifest:media-type="image/png"/>
  <manifest:file-entry manifest:full-path="Pictures/10000001000001E9000000BEBD98B3C5.png" manifest:media-type="image/png"/>
  <manifest:file-entry manifest:full-path="Pictures/10000001000001E0000000BC376A67A7.png" manifest:media-type="image/png"/>
  <manifest:file-entry manifest:full-path="Pictures/10000001000001E0000000BC66F95013.png" manifest:media-type="image/png"/>
  <manifest:file-entry manifest:full-path="Pictures/10000001000001E0000000BC4505B44C.png" manifest:media-type="image/png"/>
  <manifest:file-entry manifest:full-path="Pictures/10000001000001DE000000BE619BB93C.png" manifest:media-type="image/png"/>
  <manifest:file-entry manifest:full-path="Pictures/10000001000001E9000000BFEE6911E5.png" manifest:media-type="image/png"/>
  <manifest:file-entry manifest:full-path="Pictures/10000001000001E9000000BF3F105E13.png" manifest:media-type="image/png"/>
  <manifest:file-entry manifest:full-path="Pictures/10000001000001E1000000C986D5BC6F.png" manifest:media-type="image/png"/>
  <manifest:file-entry manifest:full-path="Pictures/10000001000001DE000000BC3FC32252.png" manifest:media-type="image/png"/>
  <manifest:file-entry manifest:full-path="Pictures/10000001000001DE000000BC288E1DF7.png" manifest:media-type="image/png"/>
  <manifest:file-entry manifest:full-path="Pictures/10000001000001DE000000BC3D4119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f1930"/>
    </style:style>
    <style:style style:name="P2" style:family="paragraph" style:parent-style-name="Standard">
      <style:text-properties officeooo:paragraph-rsid="001009e6"/>
    </style:style>
    <style:style style:name="P3" style:family="paragraph" style:parent-style-name="Standard">
      <style:text-properties officeooo:paragraph-rsid="00164483"/>
    </style:style>
    <style:style style:name="P4" style:family="paragraph" style:parent-style-name="Standard">
      <style:text-properties officeooo:paragraph-rsid="000dc9d6"/>
    </style:style>
    <style:style style:name="P5" style:family="paragraph" style:parent-style-name="Standard">
      <style:text-properties officeooo:paragraph-rsid="000e25d4"/>
    </style:style>
    <style:style style:name="P6" style:family="paragraph" style:parent-style-name="Standard">
      <style:text-properties officeooo:paragraph-rsid="0014a377"/>
    </style:style>
    <style:style style:name="P7" style:family="paragraph" style:parent-style-name="Standard">
      <style:text-properties officeooo:rsid="00164483" officeooo:paragraph-rsid="00164483"/>
    </style:style>
    <style:style style:name="P8" style:family="paragraph" style:parent-style-name="Standard">
      <style:text-properties officeooo:rsid="00164483" officeooo:paragraph-rsid="0014a377"/>
    </style:style>
    <style:style style:name="P9" style:family="paragraph" style:parent-style-name="Standard">
      <style:text-properties fo:color="#ff4000" loext:opacity="100%" fo:font-size="16pt" officeooo:rsid="00080f4e" officeooo:paragraph-rsid="00080f4e" style:font-size-asian="16pt" style:font-size-complex="16pt"/>
    </style:style>
    <style:style style:name="P10" style:family="paragraph" style:parent-style-name="Standard">
      <style:text-properties fo:color="#ff4000" loext:opacity="100%" fo:font-size="16pt" officeooo:rsid="00080f4e" officeooo:paragraph-rsid="000dc9d6" style:font-size-asian="16pt" style:font-size-complex="16pt"/>
    </style:style>
    <style:style style:name="P11" style:family="paragraph" style:parent-style-name="Standard">
      <style:text-properties fo:color="#ff4000" loext:opacity="100%" fo:font-size="16pt" officeooo:rsid="00080f4e" officeooo:paragraph-rsid="001009e6" style:font-size-asian="16pt" style:font-size-complex="16pt"/>
    </style:style>
    <style:style style:name="P12" style:family="paragraph" style:parent-style-name="Standard">
      <style:text-properties fo:color="#ff4000" loext:opacity="100%" fo:font-size="16pt" officeooo:rsid="00080f4e" officeooo:paragraph-rsid="0014a377" style:font-size-asian="16pt" style:font-size-complex="16pt"/>
    </style:style>
    <style:style style:name="P13" style:family="paragraph" style:parent-style-name="Table_20_Contents">
      <style:text-properties officeooo:rsid="00080f4e" officeooo:paragraph-rsid="00080f4e"/>
    </style:style>
    <style:style style:name="P14" style:family="paragraph" style:parent-style-name="Table_20_Contents">
      <style:text-properties officeooo:rsid="00080f4e" officeooo:paragraph-rsid="000e25d4"/>
    </style:style>
    <style:style style:name="P15" style:family="paragraph" style:parent-style-name="Table_20_Contents">
      <style:text-properties officeooo:rsid="00080f4e" officeooo:paragraph-rsid="000f1930"/>
    </style:style>
    <style:style style:name="P16" style:family="paragraph" style:parent-style-name="Table_20_Contents">
      <style:text-properties officeooo:rsid="00080f4e" officeooo:paragraph-rsid="001009e6"/>
    </style:style>
    <style:style style:name="P17" style:family="paragraph" style:parent-style-name="Table_20_Contents">
      <style:text-properties officeooo:rsid="00080f4e" officeooo:paragraph-rsid="00164483"/>
    </style:style>
    <style:style style:name="P18" style:family="paragraph" style:parent-style-name="Table_20_Contents">
      <style:text-properties officeooo:rsid="0009ef18" officeooo:paragraph-rsid="0009ef18"/>
    </style:style>
    <style:style style:name="P19" style:family="paragraph" style:parent-style-name="Table_20_Contents">
      <style:text-properties officeooo:rsid="0009ef18" officeooo:paragraph-rsid="000a4e51"/>
    </style:style>
    <style:style style:name="P20" style:family="paragraph" style:parent-style-name="Table_20_Contents">
      <style:text-properties officeooo:rsid="0009ef18" officeooo:paragraph-rsid="000addda"/>
    </style:style>
    <style:style style:name="P21" style:family="paragraph" style:parent-style-name="Table_20_Contents">
      <style:text-properties officeooo:rsid="0009ef18" officeooo:paragraph-rsid="000b8682"/>
    </style:style>
    <style:style style:name="P22" style:family="paragraph" style:parent-style-name="Table_20_Contents">
      <style:text-properties officeooo:rsid="0009ef18" officeooo:paragraph-rsid="000e25d4"/>
    </style:style>
    <style:style style:name="P23" style:family="paragraph" style:parent-style-name="Table_20_Contents">
      <style:text-properties officeooo:rsid="0009ef18" officeooo:paragraph-rsid="000f1930"/>
    </style:style>
    <style:style style:name="P24" style:family="paragraph" style:parent-style-name="Table_20_Contents">
      <style:text-properties officeooo:rsid="0009ef18" officeooo:paragraph-rsid="001009e6"/>
    </style:style>
    <style:style style:name="P25" style:family="paragraph" style:parent-style-name="Table_20_Contents">
      <style:text-properties officeooo:rsid="0009ef18" officeooo:paragraph-rsid="00164483"/>
    </style:style>
    <style:style style:name="P26" style:family="paragraph" style:parent-style-name="Table_20_Contents">
      <style:text-properties officeooo:rsid="0009ef18" officeooo:paragraph-rsid="001664bd"/>
    </style:style>
    <style:style style:name="P27" style:family="paragraph" style:parent-style-name="Table_20_Contents">
      <style:text-properties officeooo:rsid="000a4e51" officeooo:paragraph-rsid="000a4e51"/>
    </style:style>
    <style:style style:name="P28" style:family="paragraph" style:parent-style-name="Table_20_Contents">
      <style:text-properties officeooo:rsid="000a4e51" officeooo:paragraph-rsid="000addda"/>
    </style:style>
    <style:style style:name="P29" style:family="paragraph" style:parent-style-name="Table_20_Contents">
      <style:text-properties officeooo:rsid="000a4e51" officeooo:paragraph-rsid="000d0de0"/>
    </style:style>
    <style:style style:name="P30" style:family="paragraph" style:parent-style-name="Table_20_Contents">
      <style:text-properties officeooo:rsid="000a4e51" officeooo:paragraph-rsid="000e25d4"/>
    </style:style>
    <style:style style:name="P31" style:family="paragraph" style:parent-style-name="Table_20_Contents">
      <style:text-properties officeooo:rsid="000a4e51" officeooo:paragraph-rsid="000f1930"/>
    </style:style>
    <style:style style:name="P32" style:family="paragraph" style:parent-style-name="Table_20_Contents">
      <style:text-properties officeooo:rsid="000a4e51" officeooo:paragraph-rsid="001009e6"/>
    </style:style>
    <style:style style:name="P33" style:family="paragraph" style:parent-style-name="Table_20_Contents">
      <style:text-properties officeooo:rsid="000a4e51" officeooo:paragraph-rsid="0010ba79"/>
    </style:style>
    <style:style style:name="P34" style:family="paragraph" style:parent-style-name="Table_20_Contents">
      <style:text-properties officeooo:rsid="000a4e51" officeooo:paragraph-rsid="00164483"/>
    </style:style>
    <style:style style:name="P35" style:family="paragraph" style:parent-style-name="Table_20_Contents">
      <style:text-properties officeooo:rsid="000a4e51" officeooo:paragraph-rsid="001664bd"/>
    </style:style>
    <style:style style:name="P36" style:family="paragraph" style:parent-style-name="Table_20_Contents">
      <style:text-properties officeooo:rsid="000a4e51" officeooo:paragraph-rsid="00175160"/>
    </style:style>
    <style:style style:name="P37" style:family="paragraph" style:parent-style-name="Table_20_Contents">
      <style:text-properties officeooo:rsid="000b8682" officeooo:paragraph-rsid="000b8682"/>
    </style:style>
    <style:style style:name="P38" style:family="paragraph" style:parent-style-name="Table_20_Contents">
      <style:text-properties officeooo:rsid="001664bd" officeooo:paragraph-rsid="001664bd"/>
    </style:style>
    <style:style style:name="P39" style:family="paragraph" style:parent-style-name="Text_20_body">
      <style:text-properties officeooo:paragraph-rsid="001997e5"/>
    </style:style>
    <style:style style:name="P40" style:family="paragraph" style:parent-style-name="Text_20_body">
      <style:text-properties officeooo:paragraph-rsid="001c04f5"/>
    </style:style>
    <style:style style:name="P41" style:family="paragraph" style:parent-style-name="Text_20_body">
      <style:text-properties fo:font-size="16pt" fo:font-weight="normal" officeooo:rsid="00207075" officeooo:paragraph-rsid="00207075" style:font-size-asian="14pt" style:font-weight-asian="normal" style:font-size-complex="16pt" style:font-weight-complex="normal"/>
    </style:style>
    <style:style style:name="P42" style:family="paragraph" style:parent-style-name="Heading_20_1">
      <style:paragraph-properties fo:text-align="center" style:justify-single-word="false"/>
      <style:text-properties style:font-name="DejaVu Math TeX Gyre" fo:font-size="36pt" officeooo:paragraph-rsid="001997e5" style:font-size-asian="36pt" style:font-size-complex="36pt"/>
    </style:style>
    <style:style style:name="P43" style:family="paragraph" style:parent-style-name="Heading_20_1">
      <style:text-properties fo:color="#729fcf" loext:opacity="100%" officeooo:paragraph-rsid="001997e5"/>
    </style:style>
    <style:style style:name="P44" style:family="paragraph" style:parent-style-name="Heading_20_1">
      <style:text-properties fo:color="#729fcf" loext:opacity="100%"/>
    </style:style>
    <style:style style:name="P45" style:family="paragraph" style:parent-style-name="Heading_20_1">
      <style:text-properties officeooo:paragraph-rsid="000f1930"/>
    </style:style>
    <style:style style:name="P46" style:family="paragraph" style:parent-style-name="Heading_20_1">
      <style:text-properties officeooo:paragraph-rsid="001009e6"/>
    </style:style>
    <style:style style:name="P47" style:family="paragraph" style:parent-style-name="Heading_20_1">
      <style:text-properties officeooo:paragraph-rsid="00164483"/>
    </style:style>
    <style:style style:name="P48" style:family="paragraph" style:parent-style-name="Heading_20_2">
      <style:text-properties fo:font-size="14pt" fo:font-style="italic" style:font-size-asian="14pt" style:font-style-asian="italic" style:font-size-complex="14pt" style:font-style-complex="italic"/>
    </style:style>
    <style:style style:name="P49" style:family="paragraph" style:parent-style-name="Heading_20_2">
      <style:text-properties fo:font-size="14pt" fo:font-style="italic" officeooo:paragraph-rsid="000dc9d6" style:font-size-asian="14pt" style:font-style-asian="italic" style:font-size-complex="14pt" style:font-style-complex="italic"/>
    </style:style>
    <style:style style:name="P50" style:family="paragraph" style:parent-style-name="Heading_20_2">
      <style:text-properties fo:font-size="14pt" fo:font-style="italic" officeooo:paragraph-rsid="001009e6" style:font-size-asian="14pt" style:font-style-asian="italic" style:font-size-complex="14pt" style:font-style-complex="italic"/>
    </style:style>
    <style:style style:name="P51" style:family="paragraph" style:parent-style-name="Heading_20_2">
      <style:text-properties fo:font-size="14pt" fo:font-style="italic" officeooo:paragraph-rsid="0014a377" style:font-size-asian="14pt" style:font-style-asian="italic" style:font-size-complex="14pt" style:font-style-complex="italic"/>
    </style:style>
    <style:style style:name="P52" style:family="paragraph" style:parent-style-name="Heading_20_2">
      <style:text-properties fo:font-size="14pt" fo:font-style="italic" style:text-underline-style="none" officeooo:paragraph-rsid="001f6bb3" style:font-size-asian="14pt" style:font-style-asian="italic" style:font-size-complex="14pt" style:font-style-complex="italic"/>
    </style:style>
    <style:style style:name="P53" style:family="paragraph" style:parent-style-name="Text_20_body">
      <style:text-properties style:font-name="DejaVu Math TeX Gyre" fo:font-size="16pt" fo:font-style="normal" fo:font-weight="normal" officeooo:rsid="00207075" officeooo:paragraph-rsid="00207075" style:font-size-asian="14pt" style:font-style-asian="normal" style:font-weight-asian="normal" style:font-size-complex="16pt" style:font-style-complex="normal" style:font-weight-complex="normal"/>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3"/>
    <style:style style:name="P87" style:family="paragraph" style:parent-style-name="Text_20_body" style:list-style-name="L34"/>
    <style:style style:name="P88" style:family="paragraph" style:parent-style-name="Text_20_body" style:list-style-name="L35"/>
    <style:style style:name="P89" style:family="paragraph" style:parent-style-name="Text_20_body" style:list-style-name="L13">
      <style:paragraph-properties fo:text-align="end" style:justify-single-word="false"/>
    </style:style>
    <style:style style:name="T1" style:family="text">
      <style:text-properties officeooo:rsid="00080f4e"/>
    </style:style>
    <style:style style:name="T2" style:family="text">
      <style:text-properties fo:font-weight="bold" style:font-weight-asian="bold" style:font-weight-complex="bold"/>
    </style:style>
    <style:style style:name="T3" style:family="text">
      <style:text-properties fo:font-weight="bold" officeooo:rsid="001a7dd3" style:font-weight-asian="bold" style:font-weight-complex="bold"/>
    </style:style>
    <style:style style:name="T4" style:family="text">
      <style:text-properties fo:font-weight="bold" officeooo:rsid="001c04f5" style:font-weight-asian="bold" style:font-weight-complex="bold"/>
    </style:style>
    <style:style style:name="T5" style:family="text">
      <style:text-properties officeooo:rsid="0009ef18"/>
    </style:style>
    <style:style style:name="T6" style:family="text">
      <style:text-properties fo:color="#c9211e" loext:opacity="100%"/>
    </style:style>
    <style:style style:name="T7" style:family="text">
      <style:text-properties fo:color="#355269" loext:opacity="100%"/>
    </style:style>
    <style:style style:name="T8" style:family="text">
      <style:text-properties officeooo:rsid="000a4e51"/>
    </style:style>
    <style:style style:name="T9" style:family="text">
      <style:text-properties officeooo:rsid="000addda"/>
    </style:style>
    <style:style style:name="T10" style:family="text">
      <style:text-properties officeooo:rsid="000b8682"/>
    </style:style>
    <style:style style:name="T11" style:family="text">
      <style:text-properties officeooo:rsid="000d0de0"/>
    </style:style>
    <style:style style:name="T12" style:family="text">
      <style:text-properties fo:font-style="italic" style:font-style-asian="italic" style:font-style-complex="italic"/>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bold" officeooo:rsid="000dc9d6"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bold" officeooo:rsid="001009e6"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officeooo:rsid="0014a377"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64483"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0dc9d6"/>
    </style:style>
    <style:style style:name="T20" style:family="text">
      <style:text-properties officeooo:rsid="000e25d4"/>
    </style:style>
    <style:style style:name="T21" style:family="text">
      <style:text-properties officeooo:rsid="000f1930"/>
    </style:style>
    <style:style style:name="T22" style:family="text">
      <style:text-properties officeooo:rsid="000fc5df"/>
    </style:style>
    <style:style style:name="T23" style:family="text">
      <style:text-properties officeooo:rsid="001009e6"/>
    </style:style>
    <style:style style:name="T24" style:family="text">
      <style:text-properties officeooo:rsid="0010ba79"/>
    </style:style>
    <style:style style:name="T25" style:family="text">
      <style:text-properties officeooo:rsid="0012b638"/>
    </style:style>
    <style:style style:name="T26" style:family="text">
      <style:text-properties officeooo:rsid="00164483"/>
    </style:style>
    <style:style style:name="T27" style:family="text">
      <style:text-properties officeooo:rsid="001664bd"/>
    </style:style>
    <style:style style:name="T28" style:family="text">
      <style:text-properties officeooo:rsid="00175160"/>
    </style:style>
    <style:style style:name="T29" style:family="text">
      <style:text-properties officeooo:rsid="0017e0f7"/>
    </style:style>
    <style:style style:name="T30" style:family="text">
      <style:text-properties fo:font-size="14pt" fo:font-style="italic" style:font-size-asian="14pt" style:font-style-asian="italic" style:font-size-complex="14pt" style:font-style-complex="italic"/>
    </style:style>
    <style:style style:name="T31" style:family="text">
      <style:text-properties officeooo:rsid="001a7dd3"/>
    </style:style>
    <style:style style:name="T32" style:family="text">
      <style:text-properties style:font-name="DejaVu Math TeX Gyre" fo:font-style="normal" style:font-style-asian="normal" style:font-style-complex="normal"/>
    </style:style>
    <style:style style:name="T33" style:family="text">
      <style:text-properties fo:color="#729fcf" loext:opacity="100%"/>
    </style:style>
    <style:style style:name="T34" style:family="text">
      <style:text-properties fo:color="#729fcf" loext:opacity="100%" officeooo:rsid="001c04f5"/>
    </style:style>
    <style:style style:name="T35" style:family="text">
      <style:text-properties officeooo:rsid="001c04f5"/>
    </style:style>
    <style:style style:name="T36" style:family="text">
      <style:text-properties officeooo:rsid="001edc10"/>
    </style:style>
    <style:style style:name="T37" style:family="text">
      <style:text-properties officeooo:rsid="0020e248"/>
    </style:style>
    <style:style style:name="T38" style:family="text">
      <style:text-properties officeooo:rsid="0022e07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span text:style-name="T4">Rapport </text:span><text:span text:style-name="T2">P</text:span><text:span text:style-name="T3">rogrammation Agent </text:span>: <text:span text:style-name="T18">Modélisation d’un match de foot</text:span></text:h>
      <text:p text:style-name="P41"><text:span text:style-name="T32"/></text:p>
      <text:p text:style-name="P53">Nathan, Kazël, Sami , Jules</text:p>
      <text:p text:style-name="P39"><draw:frame draw:style-name="fr1" draw:name="Image18" text:anchor-type="char" svg:width="17cm" svg:height="16.734cm" draw:z-index="17"><draw:image xlink:href="Pictures/10000001000003570000027E29191E5F.png" xlink:type="simple" xlink:show="embed" xlink:actuate="onLoad" draw:mime-type="image/png"/></draw:frame></text:p>
      <text:h text:style-name="P43" text:outline-level="1" text:is-list-header="true"><text:soft-page-break/>Présentation des Agents du Modèle</text:h>
      <text:h text:style-name="Heading_20_3" text:outline-level="3"><text:span text:style-name="Strong_20_Emphasis"><text:span text:style-name="T12">Attaquants et Défenseurs</text:span></text:span></text:h>
      <text:p text:style-name="Text_20_body">Le cœur du modèle repose sur les joueurs de champ, divisés en attaquants et défenseurs. Leur comportement est similaire dans la structure, mais diverge selon leur rôle. Chaque joueur évolue selon plusieurs états :</text:p>
      <text:h text:style-name="Heading_20_4" text:outline-level="4"><text:span text:style-name="Strong_20_Emphasis">1. État “sans ballon” <text:s/>Défense</text:span></text:h>
      <text:p text:style-name="Text_20_body">Lorsqu’un joueur ne possède pas la balle :</text:p>
      <text:list text:style-name="L1">
        <text:list-item>
          <text:p text:style-name="P54">Il se dirige vers le ballon uniquement si celui-ci entre dans un certain rayon de perception.</text:p>
        </text:list-item>
        <text:list-item>
          <text:p text:style-name="P54">Les défenseurs, tant que le ballon est loin, reviennent naturellement à leur position d’origine : leur rôle est de maintenir la structure défensive jusqu’à ce qu’un danger se rapproche.</text:p>
        </text:list-item>
        <text:list-item>
          <text:p text:style-name="P54">Les attaquants, eux, oscillent entre recherche du ballon et repositionnement.</text:p>
        </text:list-item>
        <text:list-item>
          <text:p text:style-name="P54">Pendant ce temps, le gardien balaie latéralement sa cage pour la protéger.</text:p>
        </text:list-item>
      </text:list>
      <text:h text:style-name="Heading_20_4" text:outline-level="4"><text:span text:style-name="Strong_20_Emphasis">2. État “avec ballon” : Attaque</text:span></text:h>
      <text:p text:style-name="Text_20_body">Quand un joueur possède la balle :</text:p>
      <text:list text:style-name="L2">
        <text:list-item>
          <text:p text:style-name="P55">Il avance d’un certain nombre de pas vers le camp adverse.</text:p>
        </text:list-item>
        <text:list-item>
          <text:p text:style-name="P55">Si un coéquipier se trouve dans son rayon de perception et dans une position plus avancée (coordonnée x plus proche du but adverse), il lui fait une passe.</text:p>
        </text:list-item>
        <text:list-item>
          <text:p text:style-name="P55">Sinon, il continue sa progression balle au pied.</text:p>
        </text:list-item>
      </text:list>
      <text:h text:style-name="Heading_20_4" text:outline-level="4"><text:span text:style-name="Strong_20_Emphasis">3. État “face au but adverse” : Tir</text:span></text:h>
      <text:p text:style-name="Text_20_body">Une fois suffisamment proche de la cage :</text:p>
      <text:list text:style-name="L3">
        <text:list-item>
          <text:p text:style-name="P56">Le joueur tire vers le patch gris représentant le but.</text:p>
        </text:list-item>
        <text:list-item>
          <text:p text:style-name="P56">La puissance du tir dépend d’un slider, ce qui influence la vitesse du ballon vers le but ciblé.</text:p>
        </text:list-item>
      </text:list>
      <text:h text:style-name="Heading_20_4" text:outline-level="4"><text:span text:style-name="Strong_20_Emphasis">4. Interaction avec le gardien</text:span></text:h>
      <text:list text:style-name="L4">
        <text:list-item>
          <text:p text:style-name="P57">Si le ballon entre dans le rayon d'interception du gardien (proportionnel à la taille de ses “bras”), il l’attrape immédiatement.</text:p>
        </text:list-item>
        <text:list-item>
          <text:p text:style-name="P57">Le jeu repart alors par une remise en jeu depuis l’axe central, sans modification du score.</text:p>
        </text:list-item>
      </text:list>
      <text:h text:style-name="Heading_20_3" text:outline-level="3"><text:span text:style-name="Strong_20_Emphasis"><text:span text:style-name="T12">Gardien</text:span></text:span></text:h>
      <text:p text:style-name="Text_20_body">Le gardien est un agent très particulier :</text:p>
      <text:list text:style-name="L5">
        <text:list-item>
          <text:p text:style-name="P58">Il parcourt constamment sa ligne de but, d’un poteau à l’autre, avec une vitesse contrôlée par un slider.</text:p>
        </text:list-item>
        <text:list-item>
          <text:p text:style-name="P58">Son rôle principal est d'intercepter les balles qui entrent dans sa zone.</text:p>
        </text:list-item>
        <text:list-item>
          <text:p text:style-name="P58">Lorsqu'il récupère la balle, il déclenche une remise en jeu automatique, sans accorder de but.</text:p>
        </text:list-item>
      </text:list>
      <text:p text:style-name="Text_20_body"><text:soft-page-break/>Le gardien n’attaque jamais, ne fait pas de passes complexes et ne monte pas sur le terrain. Son comportement est volontairement simple pour reproduire un rôle strictement défensif.</text:p>
      <text:h text:style-name="Heading_20_3" text:outline-level="3"><text:span text:style-name="Strong_20_Emphasis"><text:span text:style-name="T12">Arbitre</text:span></text:span></text:h>
      <text:p text:style-name="Text_20_body">L’arbitre <text:span text:style-name="T35">en gris </text:span>est volontairement un agent “spectateur” :</text:p>
      <text:list text:style-name="L6">
        <text:list-item>
          <text:p text:style-name="P59">Il suit le ballon à distance, sans jamais le toucher.</text:p>
        </text:list-item>
        <text:list-item>
          <text:p text:style-name="P59">Il n’interfère avec aucun joueur.</text:p>
        </text:list-item>
        <text:list-item>
          <text:p text:style-name="P59">Il sert uniquement de présence visuelle pour donner un sentiment plus réaliste au match.</text:p>
        </text:list-item>
      </text:list>
      <text:p text:style-name="Text_20_body">Comme dans le vrai football, il observe, mais n’influence pas le jeu.</text:p>
      <text:h text:style-name="Heading_20_3" text:outline-level="3"><text:span text:style-name="Strong_20_Emphasis"><text:span text:style-name="T12">Ballon</text:span></text:span></text:h>
      <text:p text:style-name="Text_20_body">Le ballon est un agent unique avec son propre comportement :</text:p>
      <text:list text:style-name="L7">
        <text:list-item>
          <text:p text:style-name="P60">Lorsqu'il est en possession d'un joueur, il colle littéralement à lui, suivant ses déplacements.</text:p>
        </text:list-item>
        <text:list-item>
          <text:p text:style-name="P60">Lorsqu’il est libre, il avance selon sa vitesse courante, qui diminue progressivement à chaque tick en raison du frottement appliqué.</text:p>
        </text:list-item>
        <text:list-item>
          <text:p text:style-name="P60">Ses rebonds et arrêts dépendent de l’environnement (lignes blanches, cages…).</text:p>
        </text:list-item>
        <text:list-item>
          <text:p text:style-name="P60">Il peut être propulsé par des tirs ou par des passes.</text:p>
        </text:list-item>
      </text:list>
      <text:p text:style-name="Text_20_body"/>
      <text:h text:style-name="Heading_20_3" text:outline-level="3"><text:span text:style-name="Strong_20_Emphasis"><text:span text:style-name="T12">Environnement</text:span></text:span></text:h>
      <text:p text:style-name="Text_20_body">Le terrain est entièrement construit à partir des patches :</text:p>
      <text:list text:style-name="L8">
        <text:list-item>
          <text:p text:style-name="P61">Les couleurs identifient la pelouse, les lignes blanches, la cage <text:span text:style-name="T35">en gris</text:span>, et l’axe central <text:span text:style-name="T35">en noir</text:span>.</text:p>
        </text:list-item>
        <text:list-item>
          <text:p text:style-name="P61">Les paramètres essentiels du terrain (largeur réelle, longueur, taille des cages) sont stockés en variables globales afin que le code s’adapte automatiquement lorsque ces dimensions changent.</text:p>
        </text:list-item>
      </text:list>
      <text:h text:style-name="P44" text:outline-level="1" text:is-list-header="true">Justification du Choix du Projet</text:h>
      <text:p text:style-name="Text_20_body">Nous avons choisi ce projet pour plusieurs raisons :</text:p>
      <text:list text:style-name="L9">
        <text:list-item>
          <text:p text:style-name="P62">L’idée est originale et immédiatement motivante.</text:p>
        </text:list-item>
        <text:list-item>
          <text:p text:style-name="P62">La complexité semble élevée, mais reste suffisamment maîtrisable avec NetLogo.</text:p>
        </text:list-item>
        <text:list-item>
          <text:p text:style-name="P62">Le thème du football rend le travail plus intéressant et agréable à réaliser.</text:p>
        </text:list-item>
        <text:list-item>
          <text:p text:style-name="P62">La dynamique du jeu (passes, tirs, interceptions, tacles aléatoires) permet d’observer de nombreux comportements émergents.</text:p>
        </text:list-item>
      </text:list>
      <text:p text:style-name="Text_20_body">Ce projet permet en plus de manipuler des notions variées : agents autonomes, probabilités, gestion d’environnement, interactions, trajectoires…</text:p>
      <text:h text:style-name="Heading_20_1" text:outline-level="1" text:is-list-header="true"><text:soft-page-break/><text:span text:style-name="T33">Attentes </text:span><text:span text:style-name="T34">globales</text:span><text:span text:style-name="T33"> du Modèle</text:span></text:h>
      <text:p text:style-name="Text_20_body">Dans ce modèle, les deux équipes sont construites de manière parfaitement symétrique : mêmes vitesses, mêmes rôles, mêmes règles de décision. Nous nous attendions donc à un système <text:span text:style-name="Strong_20_Emphasis">globalement équilibré</text:span>, où aucune équipe ne domine simplement grâce au code.</text:p>
      <text:p text:style-name="P40">Cependant, plusieurs éléments ajoutent de la variabilité d’un match à l’autre : <text:span text:style-name="T35">le nombre de joueurs, leurs vitesses, </text:span>les passes dépendantes de la position, les limites de dribble, les interceptions du gardien, ou encore les déplacements d’évitement qui modifient constamment la formation.</text:p>
      <text:p text:style-name="Text_20_body">Nous anticipions donc :</text:p>
      <text:list text:style-name="L10">
        <text:list-item>
          <text:p text:style-name="P63">des matchs toujours différents,</text:p>
        </text:list-item>
        <text:list-item>
          <text:p text:style-name="P63">des scores parfois surprenants,</text:p>
        </text:list-item>
        <text:list-item>
          <text:p text:style-name="P63">mais, sur une série de parties, un résultat global <text:span text:style-name="Strong_20_Emphasis">cohérent et plutôt équilibré</text:span> entre les deux équipes.</text:p>
        </text:list-item>
      </text:list>
      <text:p text:style-name="Text_20_body">L’objectif était d’obtenir une simulation vivante mais juste <text:s/>et ces attentes guident toute l’analyse des tests.</text:p>
      <text:h text:style-name="P44" text:outline-level="1">Plan Général des Tests</text:h>
      <text:p text:style-name="Standard"/>
      <text:p text:style-name="Standard">Chaque test se déroule jusqu’au tick <text:span text:style-name="T9">1</text:span>0 000 <text:span text:style-name="T11">en général</text:span> et comporte <text:span text:style-name="T20">n</text:span> matchs. Les tableaux suivants permettent de structurer les attentes, les observations et les résultats obtenus. <text:span text:style-name="T31">Tacle-chance = 69 ; vitesse-gardien = 0.7 et bras-gardien(rayon de perception du gardien) = 1. Tous les joueurs de taille = 1.5.</text:span></text:p>
      <text:p text:style-name="Standard"/>
      <text:p text:style-name="P9"><text:span text:style-name="T14">1- </text:span><text:span text:style-name="T13">Test équilibré</text:span></text:p>
      <text:h text:style-name="P48" text:outline-level="2"><text:span text:style-name="T1">A</text:span>. Description du Test</text:h>
      <text:p text:style-name="Standard"><text:span text:style-name="T2">Objectif du test </text:span>: É<text:span text:style-name="T1">valuer si le modèle simule un match équilibré, c’est-à-dire un match ou aucune équipe ne domine systématiquement l’autre.</text:span></text:p>
      <text:p text:style-name="Standard"/>
      <text:p text:style-name="Standard"><text:span text:style-name="T2">Comportement théorique attendu</text:span> : <text:span text:style-name="T5">On s’attend à ce que le score final reste serré, dans l’intervalle de 2 à 3 buts de différence. La balle doit passer du coté Barça puis du coté Réal régulièrement.</text:span></text:p>
      <text:h text:style-name="P52" text:outline-level="2"><text:span text:style-name="T1">B</text:span>. Résultats Bruts (5 matchs)</text:h>
      <table:table table:name="Tableau1" table:style-name="Tableau1">
        <table:table-column table:style-name="Tableau1.A" table:number-columns-repeated="3"/>
        <table:table-row>
          <table:table-cell table:style-name="Tableau1.A1" office:value-type="string">
            <text:p text:style-name="P13">Match</text:p>
          </table:table-cell>
          <table:table-cell table:style-name="Tableau1.A1" office:value-type="string">
            <text:p text:style-name="P13">Paramètres modifiés <text:span text:style-name="T5">(Nombre ; speed)</text:span></text:p>
          </table:table-cell>
          <table:table-cell table:style-name="Tableau1.C1" office:value-type="string">
            <text:p text:style-name="P13">Résultats</text:p>
          </table:table-cell>
        </table:table-row>
        <table:table-row>
          <table:table-cell table:style-name="Tableau1.A2" office:value-type="string">
            <text:p text:style-name="P13">1</text:p>
          </table:table-cell>
          <table:table-cell table:style-name="Tableau1.A2" office:value-type="string">
            <text:p text:style-name="P18"><text:span text:style-name="T6">Barça </text:span>: Attaquants (3 ; 0.3 )</text:p>
            <text:p text:style-name="P18">Défenseurs (3 ; 0.1 )</text:p>
            <text:p text:style-name="P18"/>
            <text:p text:style-name="P18"/>
            <text:p text:style-name="P18"><text:span text:style-name="T7">Réal </text:span>: Attaquants (3 ; 0.3 )</text:p>
            <text:p text:style-name="P18">Défenseurs (3 ; 0.1 )</text:p>
          </table:table-cell>
          <table:table-cell table:style-name="Tableau1.C2" office:value-type="string">
            <text:p text:style-name="P27">Scores : <text:span text:style-name="T9">8</text:span> – <text:span text:style-name="T9">3</text:span> pour le <text:span text:style-name="T9">Barça</text:span></text:p>
            <text:p text:style-name="P27"><draw:frame draw:style-name="fr1" draw:name="Image2" text:anchor-type="char" svg:width="5.438cm" svg:height="2.129cm" draw:z-index="0"><draw:image xlink:href="Pictures/10000001000001E0000000BC1E42EE4E.png" xlink:type="simple" xlink:show="embed" xlink:actuate="onLoad" draw:mime-type="image/png"/></draw:frame></text:p>
          </table:table-cell>
        </table:table-row>
        <table:table-row>
          <table:table-cell table:style-name="Tableau1.A2" office:value-type="string">
            <text:p text:style-name="P13">2</text:p>
          </table:table-cell>
          <table:table-cell table:style-name="Tableau1.A2" office:value-type="string">
            <text:p text:style-name="P19"><text:span text:style-name="T6">Barça </text:span>: Attaquants (<text:span text:style-name="T8">7</text:span> ; 0.3 )</text:p>
            <text:p text:style-name="P19">Défenseurs (<text:span text:style-name="T8">7</text:span> ; 0.1 )</text:p>
            <text:p text:style-name="P19"><text:soft-page-break/></text:p>
            <text:p text:style-name="P19"/>
            <text:p text:style-name="P19"><text:span text:style-name="T7">Réal </text:span>: Attaquants (<text:span text:style-name="T8">7</text:span> ; 0.3 )</text:p>
            <text:p text:style-name="P19">Défenseurs (<text:span text:style-name="T8">7</text:span> ; 0.1 )</text:p>
          </table:table-cell>
          <table:table-cell table:style-name="Tableau1.C2" office:value-type="string">
            <text:p text:style-name="P28">Scores : <text:span text:style-name="T9">34 </text:span>– <text:span text:style-name="T9">33</text:span> pour le <text:span text:style-name="T9">Barça</text:span></text:p>
            <text:p text:style-name="P28"><draw:frame draw:style-name="fr3" draw:name="Image1" text:anchor-type="char" svg:x="-0.044cm" svg:y="0.099cm" svg:width="5.438cm" svg:height="2.129cm" draw:z-index="1"><draw:image xlink:href="Pictures/10000001000001E0000000BCB1BDEE69.png" xlink:type="simple" xlink:show="embed" xlink:actuate="onLoad" draw:mime-type="image/png"/></draw:frame><text:soft-page-break/></text:p>
          </table:table-cell>
        </table:table-row>
        <table:table-row>
          <table:table-cell table:style-name="Tableau1.A2" office:value-type="string">
            <text:p text:style-name="P13">3 : <text:span text:style-name="T11">5000 tick</text:span></text:p>
          </table:table-cell>
          <table:table-cell table:style-name="Tableau1.A2" office:value-type="string">
            <text:p text:style-name="P20"><text:span text:style-name="T6">Barça </text:span>: Attaquants (<text:span text:style-name="T9">20</text:span> ; 0.<text:span text:style-name="T9">5</text:span> )</text:p>
            <text:p text:style-name="P20">Défenseurs (<text:span text:style-name="T9">20</text:span> ; 0.1 )</text:p>
            <text:p text:style-name="P20"/>
            <text:p text:style-name="P20"/>
            <text:p text:style-name="P20"><text:span text:style-name="T7">Réal </text:span>: Attaquants (<text:span text:style-name="T9">20</text:span> ; 0.<text:span text:style-name="T9">5 </text:span>)</text:p>
            <text:p text:style-name="P20">Défenseurs (<text:span text:style-name="T9">20</text:span> ; 0.1 )</text:p>
          </table:table-cell>
          <table:table-cell table:style-name="Tableau1.C2" office:value-type="string">
            <text:p text:style-name="P28">Scores : <text:span text:style-name="T11">23</text:span><text:span text:style-name="T9"> </text:span>– <text:span text:style-name="T11">17</text:span> pour le <text:span text:style-name="T9">Barça</text:span></text:p>
            <text:p text:style-name="P28"><draw:frame draw:style-name="fr1" draw:name="Image3" text:anchor-type="char" svg:width="5.438cm" svg:height="2.129cm" draw:z-index="2"><draw:image xlink:href="Pictures/10000001000001E0000000BC376A67A7.png" xlink:type="simple" xlink:show="embed" xlink:actuate="onLoad" draw:mime-type="image/png"/></draw:frame></text:p>
            <text:p text:style-name="P28"/>
          </table:table-cell>
        </table:table-row>
        <table:table-row>
          <table:table-cell table:style-name="Tableau1.A2" office:value-type="string">
            <text:p text:style-name="P13">4 : <text:span text:style-name="T11">5000 tick</text:span></text:p>
          </table:table-cell>
          <table:table-cell table:style-name="Tableau1.A2" office:value-type="string">
            <text:p text:style-name="P21"><text:span text:style-name="T6">Barça </text:span>: Attaquants (<text:span text:style-name="T9">20</text:span> ; 0.<text:span text:style-name="T10">3</text:span> )</text:p>
            <text:p text:style-name="P21">Défenseurs (<text:span text:style-name="T9">20</text:span> ; 0.<text:span text:style-name="T10">5</text:span> )</text:p>
            <text:p text:style-name="P21"/>
            <text:p text:style-name="P21"/>
            <text:p text:style-name="P21"><text:span text:style-name="T7">Réal </text:span>: Attaquants (<text:span text:style-name="T9">20</text:span> ; 0.<text:span text:style-name="T10">3</text:span><text:span text:style-name="T9"> </text:span>)</text:p>
            <text:p text:style-name="P21">Défenseurs (<text:span text:style-name="T9">20</text:span> ; 0.<text:span text:style-name="T10">5</text:span> )</text:p>
          </table:table-cell>
          <table:table-cell table:style-name="Tableau1.C2" office:value-type="string">
            <text:p text:style-name="P29">Scores : <text:span text:style-name="T11">7</text:span><text:span text:style-name="T9"> </text:span>– <text:span text:style-name="T11">8</text:span> pour le <text:span text:style-name="T11">Réal</text:span></text:p>
            <text:p text:style-name="P29"><draw:frame draw:style-name="fr1" draw:name="Image5" text:anchor-type="char" svg:width="5.438cm" svg:height="2.129cm" draw:z-index="4"><draw:image xlink:href="Pictures/10000001000001E0000000BC66F95013.png" xlink:type="simple" xlink:show="embed" xlink:actuate="onLoad" draw:mime-type="image/png"/></draw:frame></text:p>
            <text:p text:style-name="P29"/>
          </table:table-cell>
        </table:table-row>
        <table:table-row>
          <table:table-cell table:style-name="Tableau1.A2" office:value-type="string">
            <text:p text:style-name="P37">5</text:p>
          </table:table-cell>
          <table:table-cell table:style-name="Tableau1.A2" office:value-type="string">
            <text:p text:style-name="P21"><text:span text:style-name="T6">Barça </text:span>: Attaquants (<text:span text:style-name="T10">3</text:span> ; 0.<text:span text:style-name="T10">3</text:span> )</text:p>
            <text:p text:style-name="P21">Défenseurs (<text:span text:style-name="T10">7</text:span> ; 0.<text:span text:style-name="T10">1</text:span> )</text:p>
            <text:p text:style-name="P21"/>
            <text:p text:style-name="P21"/>
            <text:p text:style-name="P21"><text:span text:style-name="T7">Réal </text:span>: Attaquants (<text:span text:style-name="T10">3</text:span> ; 0.<text:span text:style-name="T10">3</text:span><text:span text:style-name="T9"> </text:span>)</text:p>
            <text:p text:style-name="P21">Défenseurs (<text:span text:style-name="T10">7</text:span> ; 0.<text:span text:style-name="T10">1</text:span> )</text:p>
          </table:table-cell>
          <table:table-cell table:style-name="Tableau1.C2" office:value-type="string">
            <text:p text:style-name="P29">Scores : <text:span text:style-name="T11">6</text:span><text:span text:style-name="T9"> </text:span>– <text:span text:style-name="T11">6</text:span> <text:span text:style-name="T11">Nul</text:span></text:p>
            <text:p text:style-name="P29"><draw:frame draw:style-name="fr1" draw:name="Image4" text:anchor-type="char" svg:width="5.438cm" svg:height="2.129cm" draw:z-index="3"><draw:image xlink:href="Pictures/10000001000001E0000000BC4505B44C.png" xlink:type="simple" xlink:show="embed" xlink:actuate="onLoad" draw:mime-type="image/png"/></draw:frame></text:p>
          </table:table-cell>
        </table:table-row>
      </table:table>
      <text:p text:style-name="Text_20_body"/>
      <text:h text:style-name="P48" text:outline-level="2"><text:span text:style-name="T1">C</text:span>. Analyse des Résultats</text:h>
      <text:p text:style-name="Text_20_body">Les attentes du test étaient d’obtenir des matchs globalement équilibrés, avec un écart de 2 à 3 buts maximum et une circulation régulière du ballon d’un camp à l’autre.</text:p>
      <text:p text:style-name="Text_20_body">Sur les 5 matchs simulés :</text:p>
      <text:list text:style-name="L11">
        <text:list-item>
          <text:p text:style-name="P64"><text:span text:style-name="Strong_20_Emphasis">Match 1 et 2</text:span> : on observe un net avantage du Barça (scores du type 8–3 / 34–33 / etc. selon les paramètres). Le modèle reste capable de faire marquer les deux équipes, mais l’écart de buts est parfois supérieur aux 2–3 buts attendus. Cela montre que, pour certains réglages (nombre de joueurs et vitesse), le Barça domine plus souvent les échanges.</text:p>
        </text:list-item>
        <text:list-item>
          <text:p text:style-name="P64"><text:span text:style-name="Strong_20_Emphasis">Match 3 (5000 ticks, effectifs et vitesses élevés)</text:span> : le score est très élevé (23–17 pour le Barça). L’écart de 6 buts est plus important que ce qu’on visait, mais on voit que les deux équipes se créent beaucoup d’occasions. L’augmentation du nombre de joueurs et des vitesses rend le jeu plus dynamique, mais aussi plus « ouvert », ce qui gonfle le nombre de buts.</text:p>
        </text:list-item>
        <text:list-item>
          <text:p text:style-name="P64"><text:soft-page-break/><text:span text:style-name="Strong_20_Emphasis">Match 4 (5000 ticks, défenseurs plus rapides)</text:span> : cette fois, le Réal gagne de justesse (7–8). On retrouve un match beaucoup plus serré, avec un écart d’1 but seulement. Le renforcement défensif équilibre le rapport de forces et limite le score.</text:p>
        </text:list-item>
        <text:list-item>
          <text:p text:style-name="P64"><text:span text:style-name="Strong_20_Emphasis">Match 5 (paramètres plus faibles)</text:span> : le match se termine sur un nul (6–6). C’est le cas qui correspond le mieux au comportement théorique attendu : match très équilibré, alternance de buts et aucune équipe qui écrase l’autre.</text:p>
        </text:list-item>
      </text:list>
      <text:p text:style-name="Text_20_body">En regardant les courbes (évolution des scores et éventuellement possession/position du ballon) :</text:p>
      <text:list text:style-name="L12">
        <text:list-item>
          <text:p text:style-name="P65">Les scores augmentent par « marches » régulières, ce qui montre un enchaînement d’actions de but dans les deux sens.</text:p>
        </text:list-item>
        <text:list-item>
          <text:p text:style-name="P65">Sur les tests avec beaucoup de joueurs/vitesse, la courbe est plus raide (beaucoup de buts), alors que sur les tests où les défenses sont renforcées, la progression est plus lente et plus équilibrée.</text:p>
        </text:list-item>
        <text:list-item>
          <text:p text:style-name="P65">On observe bien des phases où le ballon se trouve côté Barça puis côté Réal, ce qui valide la circulation du ballon, même si certaines configurations provoquent encore une domination fréquente d’une seule équipe.</text:p>
        </text:list-item>
      </text:list>
      <text:p text:style-name="Text_20_body">Globalement, les résultats montrent que le modèle peut produire des matchs équilibrés, mais que cet équilibre dépend fortement des paramètres (nombre de joueurs et vitesses des attaquants/défenseurs).</text:p>
      <text:p text:style-name="Standard"/>
      <text:h text:style-name="P48" text:outline-level="2"><text:span text:style-name="T1">D</text:span>. Conclusion</text:h>
      <text:p text:style-name="Text_20_body">Ce test avait pour but de vérifier si le modèle de football simulé est capable de générer des matchs réalistes et relativement équilibrés, sans qu’une équipe écrase systématiquement l’autre.</text:p>
      <text:p text:style-name="Text_20_body">Les résultats montrent que :</text:p>
      <text:list text:style-name="L13">
        <text:list-item>
          <text:p text:style-name="P89">L’objectif est <text:span text:style-name="Strong_20_Emphasis">partiellement atteint</text:span> : on obtient des matchs serrés (match 4 et match 5, avec 1 but d’écart ou un nul), mais aussi des rencontres beaucoup plus déséquilibrées (match 1 à 3 avec des écarts supérieurs à 3 buts).</text:p>
        </text:list-item>
        <text:list-item>
          <text:p text:style-name="P66">L’augmentation du nombre de joueurs et des vitesses rend le jeu plus spectaculaire mais aussi plus « chaotique », avec beaucoup de buts et parfois une équipe qui prend clairement le dessus.</text:p>
        </text:list-item>
        <text:list-item>
          <text:p text:style-name="P66">Le comportement global reste cohérent : la balle circule bien d’un camp à l’autre, les deux équipes marquent et l’issue du match n’est pas toujours la même (victoires Barça, victoires Réal, match nul).</text:p>
        </text:list-item>
      </text:list>
      <text:p text:style-name="Standard"/>
      <text:p text:style-name="P10"><text:span text:style-name="T14">2- </text:span><text:span text:style-name="T13">Test </text:span><text:span text:style-name="T14">dés</text:span><text:span text:style-name="T13">équilibré </text:span><text:span text:style-name="T14">(offensive augmentée)</text:span></text:p>
      <text:h text:style-name="P49" text:outline-level="2"><text:span text:style-name="T1">A</text:span>. Description du Test</text:h>
      <text:p text:style-name="P4"><text:span text:style-name="T2">Objectif du test </text:span>: É<text:span text:style-name="T1">valuer </text:span><text:span text:style-name="T19">le comportement du modèle quand on renforce fortement l’attaque (nombre/ vitesse)</text:span><text:span text:style-name="T1">. </text:span><text:span text:style-name="T19">L’idée est de voir comment le jeu se déséquilibre et dans quelle mesure l’équipe avantagée domine le match.</text:span></text:p>
      <text:p text:style-name="P4"/>
      <text:p text:style-name="P4"><text:soft-page-break/><text:span text:style-name="T2">Comportement théorique attendu</text:span> : <text:span text:style-name="T5">On s’attend à ce que l’é</text:span><text:span text:style-name="T19">quipe dont l’attaque est augmentée domine clairement</text:span><text:span text:style-name="T5">. </text:span><text:span text:style-name="T19">Le ballon sera plus souvent dans le camp adverse.</text:span></text:p>
      <text:h text:style-name="P49" text:outline-level="2"><text:span text:style-name="T1">B</text:span>. Résultats Bruts (<text:span text:style-name="T23">4</text:span> matchs)</text:h>
      <text:p text:style-name="P5"/>
      <table:table table:name="Tableau2" table:style-name="Tableau2">
        <table:table-column table:style-name="Tableau2.A" table:number-columns-repeated="3"/>
        <table:table-row>
          <table:table-cell table:style-name="Tableau2.A1" office:value-type="string">
            <text:p text:style-name="P14">Match</text:p>
          </table:table-cell>
          <table:table-cell table:style-name="Tableau2.A1" office:value-type="string">
            <text:p text:style-name="P14">Paramètres modifiés <text:span text:style-name="T5">(Nombre ; speed)</text:span></text:p>
          </table:table-cell>
          <table:table-cell table:style-name="Tableau2.C1" office:value-type="string">
            <text:p text:style-name="P14">Résultats</text:p>
          </table:table-cell>
        </table:table-row>
        <table:table-row>
          <table:table-cell table:style-name="Tableau2.A2" office:value-type="string">
            <text:p text:style-name="P14">1</text:p>
          </table:table-cell>
          <table:table-cell table:style-name="Tableau2.A2" office:value-type="string">
            <text:p text:style-name="P22"><text:span text:style-name="T6">Barça </text:span>: Attaquants (<text:span text:style-name="T20">7</text:span> ; 0.3 )</text:p>
            <text:p text:style-name="P22">Défenseurs (<text:span text:style-name="T20">3</text:span> ; 0.1 )</text:p>
            <text:p text:style-name="P22"/>
            <text:p text:style-name="P22"/>
            <text:p text:style-name="P22"><text:span text:style-name="T7">Réal </text:span>: Attaquants (3 ; 0.3 )</text:p>
            <text:p text:style-name="P22">Défenseurs (3 ; 0.1 )</text:p>
          </table:table-cell>
          <table:table-cell table:style-name="Tableau2.C2" office:value-type="string">
            <text:p text:style-name="P30">Scores : <text:span text:style-name="T21">9</text:span> – <text:span text:style-name="T9">3</text:span> pour le <text:span text:style-name="T9">Barça</text:span></text:p>
            <text:p text:style-name="P30"><draw:frame draw:style-name="fr2" draw:name="Image6" text:anchor-type="char" svg:width="5.438cm" svg:height="2.138cm" draw:z-index="5"><draw:image xlink:href="Pictures/10000001000001DE000000BC3FC32252.png" xlink:type="simple" xlink:show="embed" xlink:actuate="onLoad" draw:mime-type="image/png"/></draw:frame></text:p>
          </table:table-cell>
        </table:table-row>
        <table:table-row>
          <table:table-cell table:style-name="Tableau2.A2" office:value-type="string">
            <text:p text:style-name="P14">2</text:p>
          </table:table-cell>
          <table:table-cell table:style-name="Tableau2.A2" office:value-type="string">
            <text:p text:style-name="P22"><text:span text:style-name="T6">Barça </text:span>: Attaquants (<text:span text:style-name="T20">5</text:span> ; <text:span text:style-name="T20">0.3</text:span> )</text:p>
            <text:p text:style-name="P22">Défenseurs (<text:span text:style-name="T20">5</text:span> ; 0.1 )</text:p>
            <text:p text:style-name="P22"/>
            <text:p text:style-name="P22"/>
            <text:p text:style-name="P22"><text:span text:style-name="T7">Réal </text:span>: Attaquants (<text:span text:style-name="T20">5</text:span> ; <text:span text:style-name="T20">1</text:span> )</text:p>
            <text:p text:style-name="P22">Défenseurs (<text:span text:style-name="T20">5</text:span> ; 0.1 )</text:p>
          </table:table-cell>
          <table:table-cell table:style-name="Tableau2.C2" office:value-type="string">
            <text:p text:style-name="P30">Scores : <text:span text:style-name="T9">34 </text:span>– <text:span text:style-name="T9">33</text:span> pour le <text:span text:style-name="T9">Barça</text:span></text:p>
            <text:p text:style-name="P30"><draw:frame draw:style-name="fr2" draw:name="Image8" text:anchor-type="char" svg:width="5.438cm" svg:height="2.138cm" draw:z-index="6"><draw:image xlink:href="Pictures/10000001000001DE000000BC288E1DF7.png" xlink:type="simple" xlink:show="embed" xlink:actuate="onLoad" draw:mime-type="image/png"/></draw:frame></text:p>
          </table:table-cell>
        </table:table-row>
        <table:table-row>
          <table:table-cell table:style-name="Tableau2.A2" office:value-type="string">
            <text:p text:style-name="P14">3 </text:p>
          </table:table-cell>
          <table:table-cell table:style-name="Tableau2.A2" office:value-type="string">
            <text:p text:style-name="P22"><text:span text:style-name="T6">Barça </text:span>: Attaquants (<text:span text:style-name="T9">20</text:span> ; <text:span text:style-name="T20">1</text:span> )</text:p>
            <text:p text:style-name="P22">Défenseurs (<text:span text:style-name="T19">5</text:span> ; 0.1 )</text:p>
            <text:p text:style-name="P22"/>
            <text:p text:style-name="P22"/>
            <text:p text:style-name="P22"><text:span text:style-name="T7">Réal </text:span>: Attaquants (<text:span text:style-name="T19">5</text:span> ; 0.<text:span text:style-name="T19">3</text:span><text:span text:style-name="T9"> </text:span>)</text:p>
            <text:p text:style-name="P22">Défenseurs (<text:span text:style-name="T19">5</text:span> ; 0.1 )</text:p>
          </table:table-cell>
          <table:table-cell table:style-name="Tableau2.C2" office:value-type="string">
            <text:p text:style-name="P30">Scores : <text:span text:style-name="T21">49</text:span><text:span text:style-name="T9"> </text:span>– <text:span text:style-name="T21">66</text:span> pour le <text:span text:style-name="T21">Réal</text:span></text:p>
            <text:p text:style-name="P30"><draw:frame draw:style-name="fr2" draw:name="Image7" text:anchor-type="char" svg:width="5.438cm" svg:height="2.138cm" draw:z-index="7"><draw:image xlink:href="Pictures/10000001000001DE000000BC3D4119AC.png" xlink:type="simple" xlink:show="embed" xlink:actuate="onLoad" draw:mime-type="image/png"/></draw:frame></text:p>
          </table:table-cell>
        </table:table-row>
        <table:table-row>
          <table:table-cell table:style-name="Tableau2.A2" office:value-type="string">
            <text:p text:style-name="P15">4 </text:p>
          </table:table-cell>
          <table:table-cell table:style-name="Tableau2.A2" office:value-type="string">
            <text:p text:style-name="P23"><text:span text:style-name="T6">Barça </text:span>: Attaquants (<text:span text:style-name="T9">20</text:span> ; <text:span text:style-name="T21">0.3</text:span> )</text:p>
            <text:p text:style-name="P23">Défenseurs (<text:span text:style-name="T19">5</text:span> ; 0.1 )</text:p>
            <text:p text:style-name="P23"/>
            <text:p text:style-name="P23"/>
            <text:p text:style-name="P23"><text:span text:style-name="T7">Réal </text:span>: Attaquants (<text:span text:style-name="T19">5</text:span> ; <text:span text:style-name="T21">1.5</text:span><text:span text:style-name="T9"> </text:span>)</text:p>
            <text:p text:style-name="P23">Défenseurs (<text:span text:style-name="T19">5</text:span> ; 0.1 )</text:p>
          </table:table-cell>
          <table:table-cell table:style-name="Tableau2.C2" office:value-type="string">
            <text:p text:style-name="P31">Scores : <text:span text:style-name="T22">51</text:span><text:span text:style-name="T9"> </text:span>– <text:span text:style-name="T22">56</text:span> pour le <text:span text:style-name="T11">Réal</text:span></text:p>
            <text:p text:style-name="P31"><draw:frame draw:style-name="fr2" draw:name="Image9" text:anchor-type="char" svg:width="5.438cm" svg:height="2.161cm" draw:z-index="8"><draw:image xlink:href="Pictures/10000001000001DE000000BE619BB93C.png" xlink:type="simple" xlink:show="embed" xlink:actuate="onLoad" draw:mime-type="image/png"/></draw:frame></text:p>
          </table:table-cell>
        </table:table-row>
      </table:table>
      <text:p text:style-name="P1"/>
      <text:p text:style-name="P1"/>
      <text:h text:style-name="P45" text:outline-level="1"><text:span text:style-name="Strong_20_Emphasis"><text:span text:style-name="T30">C. Analyse des Résultats</text:span></text:span></text:h>
      <text:p text:style-name="Text_20_body">Les résultats montrent clairement comment le modèle réagit lorsque l’on modifie <text:span text:style-name="Strong_20_Emphasis">la quantité</text:span> ou <text:span text:style-name="Strong_20_Emphasis">la vitesse</text:span> des attaquants.</text:p>
      <text:h text:style-name="Heading_20_3" text:outline-level="3"><text:span text:style-name="Strong_20_Emphasis">Match 1 : Avantage offensif léger pour le Barça</text:span></text:h>
      <text:list text:style-name="L14">
        <text:list-item>
          <text:p text:style-name="P67"><text:span text:style-name="Emphasis">Barça : Attaquants (7 ; 0.3) Réal : Attaquants (3 ; 0.3).</text:span></text:p>
        </text:list-item>
        <text:list-item>
          <text:p text:style-name="P67">La vitesse est identique, mais le Barça possède <text:span text:style-name="Strong_20_Emphasis">plus du double d’attaquants</text:span>.</text:p>
        </text:list-item>
        <text:list-item>
          <text:p text:style-name="P67">Le résultat (9–3 pour le Barça) confirme que <text:span text:style-name="Strong_20_Emphasis">plus de joueurs rapides dans le camp adverse augmente fortement la pression offensive</text:span>.</text:p>
        </text:list-item>
        <text:list-item>
          <text:p text:style-name="P67">La possession monte régulièrement côté Barça, signe que le Réal n’arrive pas à sortir de sa <text:soft-page-break/>zone.</text:p>
        </text:list-item>
      </text:list>
      <text:h text:style-name="Heading_20_3" text:outline-level="3"><text:span text:style-name="Strong_20_Emphasis">Match 2 : Avantage offensif moyen pour le Barça</text:span></text:h>
      <text:list text:style-name="L15">
        <text:list-item>
          <text:p text:style-name="P68">Les deux équipes ont le même nombre d’attaquants (5), mais le Barça les garde à vitesse 0.3.</text:p>
        </text:list-item>
        <text:list-item>
          <text:p text:style-name="P68">Le Réal, lui, donne une vitesse de 1 à ses attaquants : <text:span text:style-name="Strong_20_Emphasis">un buff offensif nettement supérieur</text:span>.</text:p>
        </text:list-item>
        <text:list-item>
          <text:p text:style-name="P68">Malgré cela, le score final est extrêmement serré (34–33 pour le Barça).<text:line-break/><text:span text:style-name="T38">_</text:span> Cela indique que <text:span text:style-name="Strong_20_Emphasis">le nombre d’attaquants influence presque autant que la vitesse</text:span>.<text:line-break/><text:span text:style-name="T38">_</text:span> Le Réal, plus rapide, attaque davantage, mais le Barça compense par une occupation meilleure du terrain.</text:p>
        </text:list-item>
      </text:list>
      <text:h text:style-name="Heading_20_3" text:outline-level="3"><text:span text:style-name="Strong_20_Emphasis">Match 3 : Barça sur-boosté, mais vaincu</text:span></text:h>
      <text:list text:style-name="L16">
        <text:list-item>
          <text:p text:style-name="P69">Barça : Attaquants (20 ; 0.3) : Réal : Attaquants (5 ; 0.3).</text:p>
        </text:list-item>
        <text:list-item>
          <text:p text:style-name="P69">On s’attendrait logiquement à une domination totale du Barça… mais le résultat est : <text:span text:style-name="Strong_20_Emphasis">49–66 pour le Réal</text:span>.<text:line-break/>Cela révèle deux phénomènes importants dans <text:span text:style-name="T37">le</text:span> modèle :</text:p>
        </text:list-item>
      </text:list>
      <text:list text:style-name="L17">
        <text:list-item>
          <text:p text:style-name="P70"><text:span text:style-name="Strong_20_Emphasis">L’agglomération excessive</text:span> : trop d’attaquants réduisent leur efficacité, car ils se gênent mutuellement.</text:p>
        </text:list-item>
        <text:list-item>
          <text:p text:style-name="P70">Le Réal a probablement bénéficié d’un terrain plus dégagé pour progresser.</text:p>
        </text:list-item>
      </text:list>
      <text:p text:style-name="Text_20_body">Le modèle montre donc que <text:span text:style-name="Emphasis">trop augmenter un paramètre détruit sa propre efficacité</text:span>.</text:p>
      <text:h text:style-name="Heading_20_3" text:outline-level="3"><text:span text:style-name="Strong_20_Emphasis">Match 4 : Vitesses extrêmes <text:s/>domination du Réal</text:span></text:h>
      <text:list text:style-name="L18">
        <text:list-item>
          <text:p text:style-name="P71">Barça : Attaquants (20 ; 0.3)</text:p>
        </text:list-item>
        <text:list-item>
          <text:p text:style-name="P71">Réal : Attaquants (5 ; 1.5)<text:line-break/><text:span text:style-name="T38">_</text:span> Le Réal, même avec seulement 5 attaquants, profite d’une vitesse <text:span text:style-name="Strong_20_Emphasis">beaucoup plus élevée</text:span>.<text:line-break/><text:span text:style-name="T38">_</text:span> Score final : <text:span text:style-name="Strong_20_Emphasis">51–56 pour le Réal</text:span>, ce qui confirme que :<text:line-break/><text:span text:style-name="Strong_20_Emphasis">La vitesse finit par devenir le facteur dominant lorsque les équipes sont très déséquilibrées.</text:span></text:p>
        </text:list-item>
      </text:list>
      <text:h text:style-name="Heading_20_1" text:outline-level="1" text:is-list-header="true"><text:span text:style-name="Strong_20_Emphasis"><text:span text:style-name="T30">Synthèse de l’analyse</text:span></text:span></text:h>
      <text:p text:style-name="Text_20_body"><text:s/>Le modèle respecte bien la logique suivante :</text:p>
      <text:list text:style-name="L19">
        <text:list-item>
          <text:p text:style-name="P72"><text:span text:style-name="Strong_20_Emphasis">Nombre d’attaquants ↑ : pression offensive ↑</text:span>, mais seulement jusqu’à un certain seuil.</text:p>
        </text:list-item>
        <text:list-item>
          <text:p text:style-name="P72"><text:span text:style-name="Strong_20_Emphasis">Vitesse ↑ : plus d’occasions, plus de tirs, plus de buts</text:span>.</text:p>
        </text:list-item>
        <text:list-item>
          <text:p text:style-name="P72"><text:span text:style-name="Strong_20_Emphasis">Trop d’attaquants dégrade la performance</text:span> (effet d’encombrement + collisions + mauvaise répartition).</text:p>
        </text:list-item>
      </text:list>
      <text:p text:style-name="Text_20_body"><text:s/>Le jeu devient nettement déséquilibré dès que l’un des deux paramètres est fortement augmenté.<text:line-break/> La possession bascule systématiquement vers l’équipe au paramètre offensif le plus avantageux.</text:p>
      <text:p text:style-name="P1"/>
      <text:h text:style-name="P45" text:outline-level="1"><text:soft-page-break/><text:span text:style-name="Strong_20_Emphasis"><text:span text:style-name="T30">D. Conclusion</text:span></text:span></text:h>
      <text:p text:style-name="Text_20_body">Le test met clairement en évidence comment <text:span text:style-name="T37">le</text:span> modèle réagit lorsqu’on renforce l’attaque d’une équipe :</text:p>
      <text:h text:style-name="Heading_20_3" text:outline-level="3"><text:span text:style-name="Strong_20_Emphasis"><text:span text:style-name="T22">1</text:span></text:span><text:span text:style-name="Strong_20_Emphasis">. Le facteur dominant dépend du niveau de modification :</text:span></text:h>
      <text:list text:style-name="L20">
        <text:list-item>
          <text:p text:style-name="P73">Pour des valeurs modérées : <text:span text:style-name="Strong_20_Emphasis">le nombre</text:span> d’attaquants influence davantage.</text:p>
        </text:list-item>
        <text:list-item>
          <text:p text:style-name="P73">Pour des valeurs extrêmes : c’est <text:span text:style-name="Strong_20_Emphasis">la vitesse</text:span> qui prend le dessus.</text:p>
        </text:list-item>
      </text:list>
      <text:h text:style-name="Heading_20_3" text:outline-level="3"><text:span text:style-name="Strong_20_Emphasis">3. Le modèle révèle un phénomène intéressant :</text:span></text:h>
      <text:p text:style-name="Text_20_body">Lorsque trop d’attaquants sont ajoutés (ex : 20 attaquants au Barça), le jeu devient moins efficace.<text:line-break/><text:span text:style-name="T23">On pense que </text:span><text:span text:style-name="Strong_20_Emphasis">c’est un effet naturel d</text:span><text:span text:style-name="Strong_20_Emphasis"><text:span text:style-name="T23">u </text:span></text:span><text:span text:style-name="Strong_20_Emphasis">système multi-agents</text:span>, où trop de joueurs dans un même espace réduisent la fluidité du jeu.</text:p>
      <text:h text:style-name="Heading_20_3" text:outline-level="3"><text:span text:style-name="Strong_20_Emphasis">4. Le modèle est fidèle au comportement théorique attendu</text:span></text:h>
      <text:p text:style-name="Text_20_body">Dans tous les matchs, l’équipe dont l’attaque est boostée :</text:p>
      <text:list text:style-name="L21">
        <text:list-item>
          <text:p text:style-name="P74">domine plus souvent,</text:p>
        </text:list-item>
        <text:list-item>
          <text:p text:style-name="P74">marque plus,</text:p>
        </text:list-item>
        <text:list-item>
          <text:p text:style-name="P74">et garde la balle plus longtemps.</text:p>
        </text:list-item>
      </text:list>
      <text:p text:style-name="Text_20_body">Même lorsque le score final reste serré (match 2), les graphiques montrent une intensité offensive clairement supérieure.</text:p>
      <text:h text:style-name="Heading_20_3" text:outline-level="3"><text:span text:style-name="Strong_20_Emphasis"><text:span text:style-name="T12">Conclusion générale</text:span></text:span></text:h>
      <text:p text:style-name="Text_20_body">Ce test valide la cohérence du modèle lorsqu’il est volontairement déséquilibré. Le système réagit de façon crédible et cohérente : renforcer l’attaque modifie profondément la dynamique du match.</text:p>
      <text:p text:style-name="P1"/>
      <text:p text:style-name="P11"><text:span text:style-name="T16">3</text:span><text:span text:style-name="T14">- </text:span><text:span text:style-name="T13">Test </text:span><text:span text:style-name="T14">dés</text:span><text:span text:style-name="T13">équilibré </text:span><text:span text:style-name="T14">(</text:span><text:span text:style-name="T15">defense</text:span><text:span text:style-name="T14"> augmentée)</text:span></text:p>
      <text:h text:style-name="P50" text:outline-level="2"><text:span text:style-name="T1">A</text:span>. Description du Test</text:h>
      <text:p text:style-name="P2"><text:span text:style-name="T2">Objectif du test </text:span>: É<text:span text:style-name="T1">valuer </text:span><text:span text:style-name="T19">le comportement du modèle quand on renforce fortement l</text:span><text:span text:style-name="T23">a défense</text:span><text:span text:style-name="T19"> (nombre/ vitesse)</text:span><text:span text:style-name="T1">. </text:span><text:span text:style-name="T19">L’idée est de voir comment le jeu se déséquilibre et dans quelle mesure l’équipe avantagée domine le match.</text:span></text:p>
      <text:p text:style-name="P2"/>
      <text:p text:style-name="P2"><text:span text:style-name="T2">Comportement théorique attendu</text:span> : <text:span text:style-name="T5">On s’attend à ce que l’é</text:span><text:span text:style-name="T19">quipe dont </text:span><text:span text:style-name="T23">la défense</text:span><text:span text:style-name="T19"> est augmentée </text:span><text:span text:style-name="T23">encaisse moins de but et intercepte plus souvent le ballon.</text:span><text:span text:style-name="T5"> </text:span><text:span text:style-name="T19">Le ballon sera plus souvent dans le camp adverse </text:span><text:span text:style-name="T23">ou au milieu du terrain.</text:span></text:p>
      <text:h text:style-name="P50" text:outline-level="2"><text:span text:style-name="T1">B</text:span>. Résultats Bruts (<text:span text:style-name="T25">4</text:span> matchs)</text:h>
      <text:p text:style-name="P2"/>
      <table:table table:name="Tableau3" table:style-name="Tableau3">
        <table:table-column table:style-name="Tableau3.A" table:number-columns-repeated="3"/>
        <table:table-row>
          <table:table-cell table:style-name="Tableau3.A1" office:value-type="string">
            <text:p text:style-name="P16">Match</text:p>
          </table:table-cell>
          <table:table-cell table:style-name="Tableau3.A1" office:value-type="string">
            <text:p text:style-name="P16">Paramètres modifiés <text:span text:style-name="T5">(Nombre ; speed)</text:span></text:p>
          </table:table-cell>
          <table:table-cell table:style-name="Tableau3.C1" office:value-type="string">
            <text:p text:style-name="P16">Résultats</text:p>
          </table:table-cell>
        </table:table-row>
        <table:table-row>
          <table:table-cell table:style-name="Tableau3.A2" office:value-type="string">
            <text:p text:style-name="P16">1</text:p>
          </table:table-cell>
          <table:table-cell table:style-name="Tableau3.A2" office:value-type="string">
            <text:p text:style-name="P24"><text:span text:style-name="T6">Barça </text:span>: Attaquants (<text:span text:style-name="T23">3</text:span> ; 0.3 )</text:p>
            <text:p text:style-name="P24">Défenseurs (<text:span text:style-name="T23">3</text:span> ; 0.1 )</text:p>
            <text:p text:style-name="P24"><text:soft-page-break/></text:p>
            <text:p text:style-name="P24"/>
            <text:p text:style-name="P24"><text:span text:style-name="T7">Réal </text:span>: Attaquants (<text:span text:style-name="T23">3</text:span> ; 0.3 )</text:p>
            <text:p text:style-name="P24">Défenseurs (<text:span text:style-name="T23">7</text:span> ; 0.1 )</text:p>
          </table:table-cell>
          <table:table-cell table:style-name="Tableau3.C2" office:value-type="string">
            <text:p text:style-name="P32">Scores : <text:span text:style-name="T24">3</text:span> – <text:span text:style-name="T24">6</text:span> pour le <text:span text:style-name="T24">Réal</text:span></text:p>
            <text:p text:style-name="P32"><draw:frame draw:style-name="fr1" draw:name="Image10" text:anchor-type="char" svg:width="5.438cm" svg:height="2.124cm" draw:z-index="9"><draw:image xlink:href="Pictures/10000001000001E9000000BFEE6911E5.png" xlink:type="simple" xlink:show="embed" xlink:actuate="onLoad" draw:mime-type="image/png"/></draw:frame><text:soft-page-break/></text:p>
            <text:p text:style-name="P32"/>
          </table:table-cell>
        </table:table-row>
        <table:table-row>
          <table:table-cell table:style-name="Tableau3.A2" office:value-type="string">
            <text:p text:style-name="P16">2</text:p>
          </table:table-cell>
          <table:table-cell table:style-name="Tableau3.A2" office:value-type="string">
            <text:p text:style-name="P24"><text:span text:style-name="T6">Barça </text:span>: Attaquants (<text:span text:style-name="T20">5</text:span> ; <text:span text:style-name="T20">0.3</text:span> )</text:p>
            <text:p text:style-name="P24">Défenseurs (<text:span text:style-name="T20">5</text:span> ; 1 )</text:p>
            <text:p text:style-name="P24"/>
            <text:p text:style-name="P24"/>
            <text:p text:style-name="P24"><text:span text:style-name="T7">Réal </text:span>: Attaquants (<text:span text:style-name="T20">5</text:span> ; <text:span text:style-name="T23">0.3</text:span> )</text:p>
            <text:p text:style-name="P24">Défenseurs (<text:span text:style-name="T20">5</text:span> ; <text:span text:style-name="T23">0.1</text:span> )</text:p>
          </table:table-cell>
          <table:table-cell table:style-name="Tableau3.C2" office:value-type="string">
            <text:p text:style-name="P33">Scores : <text:span text:style-name="T24">42</text:span><text:span text:style-name="T9"> </text:span>– <text:span text:style-name="T24">1</text:span><text:span text:style-name="T9">3</text:span> pour le <text:span text:style-name="T9">Barça</text:span></text:p>
            <text:p text:style-name="P32"><draw:frame draw:style-name="fr1" draw:name="Image12" text:anchor-type="char" svg:width="5.438cm" svg:height="2.124cm" draw:z-index="11"><draw:image xlink:href="Pictures/10000001000001E9000000BF7543058A.png" xlink:type="simple" xlink:show="embed" xlink:actuate="onLoad" draw:mime-type="image/png"/></draw:frame></text:p>
          </table:table-cell>
        </table:table-row>
        <table:table-row>
          <table:table-cell table:style-name="Tableau3.A2" office:value-type="string">
            <text:p text:style-name="P16">3 </text:p>
          </table:table-cell>
          <table:table-cell table:style-name="Tableau3.A2" office:value-type="string">
            <text:p text:style-name="P24"><text:span text:style-name="T6">Barça </text:span>: Attaquants (<text:span text:style-name="T23">5</text:span> ; <text:span text:style-name="T23">0.3</text:span> )</text:p>
            <text:p text:style-name="P24">Défenseurs (<text:span text:style-name="T23">20</text:span> ; <text:span text:style-name="T23">1</text:span> )</text:p>
            <text:p text:style-name="P24"/>
            <text:p text:style-name="P24"/>
            <text:p text:style-name="P24"><text:span text:style-name="T7">Réal </text:span>: Attaquants (<text:span text:style-name="T19">5</text:span> ; 0.<text:span text:style-name="T19">3</text:span><text:span text:style-name="T9"> </text:span>)</text:p>
            <text:p text:style-name="P24">Défenseurs (<text:span text:style-name="T19">5</text:span> ; 0.1 )</text:p>
          </table:table-cell>
          <table:table-cell table:style-name="Tableau3.C2" office:value-type="string">
            <text:p text:style-name="P32">Scores : <text:span text:style-name="T24">33</text:span><text:span text:style-name="T9"> </text:span>– <text:span text:style-name="T24">0</text:span> pour le <text:span text:style-name="T24">Barça</text:span></text:p>
            <text:p text:style-name="P32"><draw:frame draw:style-name="fr2" draw:name="Image13" text:anchor-type="char" svg:width="5.438cm" svg:height="2.124cm" draw:z-index="12"><draw:image xlink:href="Pictures/10000001000001E9000000BF3F105E13.png" xlink:type="simple" xlink:show="embed" xlink:actuate="onLoad" draw:mime-type="image/png"/></draw:frame></text:p>
          </table:table-cell>
        </table:table-row>
        <table:table-row>
          <table:table-cell table:style-name="Tableau3.A2" office:value-type="string">
            <text:p text:style-name="P16">4 </text:p>
          </table:table-cell>
          <table:table-cell table:style-name="Tableau3.A2" office:value-type="string">
            <text:p text:style-name="P24"><text:span text:style-name="T6">Barça </text:span>: Attaquants (<text:span text:style-name="T23">5</text:span> ; <text:span text:style-name="T21">0.3</text:span> )</text:p>
            <text:p text:style-name="P24">Défenseurs (<text:span text:style-name="T23">20</text:span> ; 0.1 )</text:p>
            <text:p text:style-name="P24"/>
            <text:p text:style-name="P24"/>
            <text:p text:style-name="P24"><text:span text:style-name="T7">Réal </text:span>: Attaquants (<text:span text:style-name="T19">5</text:span> ; <text:span text:style-name="T23">0.3</text:span><text:span text:style-name="T9"> </text:span>)</text:p>
            <text:p text:style-name="P24">Défenseurs (<text:span text:style-name="T19">5</text:span> ; <text:span text:style-name="T23">1</text:span> )</text:p>
          </table:table-cell>
          <table:table-cell table:style-name="Tableau3.C2" office:value-type="string">
            <text:p text:style-name="P32">Scores : <text:span text:style-name="T24">20</text:span><text:span text:style-name="T9"> </text:span>– <text:span text:style-name="T24">7</text:span> pour le <text:span text:style-name="T24">Barça</text:span></text:p>
            <text:p text:style-name="P32"><draw:frame draw:style-name="fr2" draw:name="Image11" text:anchor-type="char" svg:width="5.438cm" svg:height="2.124cm" draw:z-index="10"><draw:image xlink:href="Pictures/10000001000001E9000000BFEDC6FF9E.png" xlink:type="simple" xlink:show="embed" xlink:actuate="onLoad" draw:mime-type="image/png"/></draw:frame></text:p>
          </table:table-cell>
        </table:table-row>
      </table:table>
      <text:p text:style-name="P2"/>
      <text:h text:style-name="P46" text:outline-level="1"><text:span text:style-name="Strong_20_Emphasis"><text:span text:style-name="T30">C. Analyse des Résultats</text:span></text:span></text:h>
      <text:p text:style-name="Text_20_body">L’objectif de ce test est d’observer comment le modèle réagit lorsque l’on renforce la défense, soit en augmentant le nombre de défenseurs, soit leur vitesse, soit les deux.<text:line-break/>Les quatre matchs donnent un résultat progressif et cohérent de l’effet de ces ajustements.</text:p>
      <text:h text:style-name="Heading_20_2" text:outline-level="2" text:is-list-header="true"><text:span text:style-name="Strong_20_Emphasis">Match 1 <text:s/>Défense du Réal renforcée en nombre (7 défenseurs, vitesse 0.1)</text:span></text:h>
      <text:p text:style-name="Text_20_body"><text:span text:style-name="Strong_20_Emphasis">Paramètres :</text:span></text:p>
      <text:list text:style-name="L22">
        <text:list-item>
          <text:p text:style-name="P75">Barça : Attaquants (3 ; 0.3), Défenseurs (3 ; 0.1)</text:p>
        </text:list-item>
        <text:list-item>
          <text:p text:style-name="P75">Réal : Attaquants (3 ; 0.3), Défenseurs (7 ; 0.1)</text:p>
        </text:list-item>
      </text:list>
      <text:p text:style-name="Text_20_body"><text:span text:style-name="Strong_20_Emphasis">Résultat : 3 – 6 pour le Réal</text:span></text:p>
      <text:p text:style-name="Text_20_body"><text:s/>Le Réal possède plus du double de défenseurs que le Barça.<text:line-break/>Même si la vitesse reste faible (0.1), le surnombre permet d’intercepter davantage de ballons et de casser les actions adverses.<text:line-break/>Le score final reflète ce contrôle plus marqué du terrain.</text:p>
      <text:p text:style-name="Text_20_body"><text:span text:style-name="Strong_20_Emphasis">Observation :</text:span> le surnombre, même sans vitesse, améliore clairement l’efficacité défensive.</text:p>
      <text:h text:style-name="Heading_20_2" text:outline-level="2" text:is-list-header="true"><text:soft-page-break/><text:span text:style-name="Strong_20_Emphasis">Match 2 <text:s/>Défense du Barça renforcée en vitesse (5 défenseurs, vitesse 1)</text:span></text:h>
      <text:p text:style-name="Text_20_body"><text:span text:style-name="Strong_20_Emphasis">Paramètres :</text:span></text:p>
      <text:list text:style-name="L23">
        <text:list-item>
          <text:p text:style-name="P76">Barça : Attaquants (5 ; 0.3), Défenseurs (5 ; 1)</text:p>
        </text:list-item>
        <text:list-item>
          <text:p text:style-name="P76">Réal : Attaquants (5 ; 0.3), Défenseurs (5 ; 0.1)</text:p>
        </text:list-item>
      </text:list>
      <text:p text:style-name="Text_20_body"><text:span text:style-name="Strong_20_Emphasis">Résultat : 42 – 13 pour le Barça</text:span></text:p>
      <text:p text:style-name="Text_20_body"><text:s/>Ici, les deux équipes ont le même nombre de défenseurs, mais le Barça leur donne une <text:span text:style-name="Strong_20_Emphasis">vitesse x10</text:span>.<text:line-break/>Cela change complètement la dynamique : les défenseurs du Barça anticipent mieux, interceptent plus vite, et empêchent quasiment toute progression adverse.</text:p>
      <text:p text:style-name="Text_20_body"><text:span text:style-name="Strong_20_Emphasis">Observation :</text:span> la vitesse des défenseurs influence bien plus le résultat que le simple nombre.</text:p>
      <text:h text:style-name="Heading_20_2" text:outline-level="2" text:is-list-header="true"><text:span text:style-name="Strong_20_Emphasis">Match 3 <text:s/>Défense du </text:span><text:span text:style-name="Strong_20_Emphasis"><text:span text:style-name="T25">Barça</text:span></text:span><text:span text:style-name="Strong_20_Emphasis"> renforcée en nombre extrême (20 défenseurs </text:span><text:span text:style-name="Strong_20_Emphasis"><text:span text:style-name="T25">et vitesse</text:span></text:span><text:span text:style-name="Strong_20_Emphasis">)</text:span></text:h>
      <text:p text:style-name="Text_20_body"><text:span text:style-name="Strong_20_Emphasis">Paramètres :</text:span></text:p>
      <text:list text:style-name="L24">
        <text:list-item>
          <text:p text:style-name="P77">Barça : Attaquants (3 ; 0.3), Défenseurs (20 ; 1) ← <text:span text:style-name="Strong_20_Emphasis">BARÇA renforcé ici (c'est ce que montre ton tableau)</text:span></text:p>
        </text:list-item>
        <text:list-item>
          <text:p text:style-name="P77">Réal : Attaquants (5 ; 0.3), Défenseurs (5 ; 0.1)</text:p>
        </text:list-item>
      </text:list>
      <text:p text:style-name="Text_20_body"><text:span text:style-name="Strong_20_Emphasis">Résultat : 33 – 0 pour le Barça</text:span></text:p>
      <text:p text:style-name="Text_20_body"><text:s/>Le Barça dispose ici de <text:span text:style-name="Strong_20_Emphasis">20 défenseurs rapides</text:span>, ce qui écrase complètement la structure du jeu.<text:line-break/>Ils ferment tout l’espace, empêchent les passes et la balle ne quitte presque plus la zone du Réal.</text:p>
      <text:p text:style-name="Text_20_body"><text:span text:style-name="Strong_20_Emphasis">Observation :</text:span> un surnombre massif <text:span text:style-name="Emphasis">combiné</text:span> à la vitesse donne une domination totale et empêche l’adversaire d’exister.</text:p>
      <text:h text:style-name="Heading_20_2" text:outline-level="2" text:is-list-header="true"><text:span text:style-name="Strong_20_Emphasis">Match 4 <text:s/>Même scénario que le match 3 mais avec défenseurs lents (20 défenseurs à vitesse 0.1)</text:span></text:h>
      <text:p text:style-name="Text_20_body"><text:span text:style-name="Strong_20_Emphasis">Paramètres :</text:span></text:p>
      <text:list text:style-name="L25">
        <text:list-item>
          <text:p text:style-name="P78">Barça : Attaquants (5 ; 0.3), Défenseurs (20 ; 0.1)</text:p>
        </text:list-item>
        <text:list-item>
          <text:p text:style-name="P78">Réal : Attaquants (5 ; 0.3), Défenseurs (5 ; 1)</text:p>
        </text:list-item>
      </text:list>
      <text:p text:style-name="Text_20_body"><text:span text:style-name="Strong_20_Emphasis">Résultat : 20 – 7 pour le Barça</text:span></text:p>
      <text:p text:style-name="Text_20_body"><text:s/>Même avec 20 défenseurs, la vitesse réduite (0.1) limite fortement leur efficacité.<text:line-break/>Ils forment une ligne dense, mais trop lente pour réagir aux attaquants rapides du Réal.</text:p>
      <text:p text:style-name="Text_20_body">Le Barça gagne tout de même, mais moins largement que dans le match où ses défenseurs étaient rapides.</text:p>
      <text:p text:style-name="Text_20_body"><text:span text:style-name="Strong_20_Emphasis">Observation :</text:span> Le surnombre ne compense pas un manque de vitesse : la mobilité reste déterminante.</text:p>
      <text:h text:style-name="Heading_20_1" text:outline-level="1" text:is-list-header="true"><text:soft-page-break/><text:span text:style-name="Strong_20_Emphasis"><text:span text:style-name="T30">Synthèse générale de l’analyse</text:span></text:span></text:h>
      <text:p text:style-name="Text_20_body">Les résultats observés montrent trois tendances robustes :</text:p>
      <text:h text:style-name="Heading_20_3" text:outline-level="3"><text:s/><text:span text:style-name="Strong_20_Emphasis">1. La vitesse des défenseurs est le facteur le plus décisif</text:span></text:h>
      <text:p text:style-name="Text_20_body">Une défense rapide contrôle le jeu, récupère la balle plus souvent, et bloque les actions adverses.</text:p>
      <text:h text:style-name="Heading_20_3" text:outline-level="3"><text:s/><text:span text:style-name="Strong_20_Emphasis">2. Le surnombre amplifie les effets, mais ne remplace pas la vitesse</text:span></text:h>
      <text:list text:style-name="L26">
        <text:list-item>
          <text:p text:style-name="P79">Beaucoup de défenseurs <text:span text:style-name="Strong_20_Emphasis">rapides</text:span> = domination totale</text:p>
        </text:list-item>
        <text:list-item>
          <text:p text:style-name="P79">Beaucoup de défenseurs <text:span text:style-name="Strong_20_Emphasis">lents</text:span> = effet limité, parfois insuffisant</text:p>
        </text:list-item>
      </text:list>
      <text:h text:style-name="Heading_20_3" text:outline-level="3"><text:s/><text:span text:style-name="Strong_20_Emphasis">3. Le modèle réagit de façon cohérente aux changements</text:span></text:h>
      <text:p text:style-name="Text_20_body">Les scores, les dynamiques et les positions de la balle correspondent exactement à ce que l’on attend dans des configurations défensives réalistes.</text:p>
      <text:h text:style-name="Heading_20_1" text:outline-level="1" text:is-list-header="true"><text:span text:style-name="Strong_20_Emphasis"><text:span text:style-name="T30">D. Conclusion</text:span></text:span></text:h>
      <text:p text:style-name="Text_20_body">Ce test montre que le modèle simule correctement l’impact d’une défense renforcée.<text:line-break/>L’équipe dont la défense est améliorée <text:s/>par la vitesse, le nombre ou les deux <text:s/>prend très clairement l’avantage dans le match, et ce de manière graduellement mesurable selon les paramètres.</text:p>
      <text:h text:style-name="Heading_20_3" text:outline-level="3"><text:span text:style-name="Strong_20_Emphasis"><text:span text:style-name="T12">Conclusion générale :</text:span></text:span></text:h>
      <text:list text:style-name="L27">
        <text:list-item>
          <text:p text:style-name="P80"><text:span text:style-name="Strong_20_Emphasis">La vitesse</text:span> détermine la capacité réelle des défenseurs à agir.</text:p>
        </text:list-item>
        <text:list-item>
          <text:p text:style-name="P80"><text:span text:style-name="Strong_20_Emphasis">Le surnombre</text:span> augmente la pression défensive, mais ne suffit pas si la mobilité est faible.</text:p>
        </text:list-item>
        <text:list-item>
          <text:p text:style-name="P80">Le modèle reproduit un comportement logique :<text:line-break/>une défense dense et mobile force la balle à rester dans le camp adverse et réduit fortement les opportunités adverses.</text:p>
          <text:p text:style-name="P80"/>
        </text:list-item>
      </text:list>
      <text:p text:style-name="P12"><text:span text:style-name="T16">4</text:span><text:span text:style-name="T14">- </text:span><text:span text:style-name="T13">Test </text:span><text:span text:style-name="T17">(Autre aspect)</text:span></text:p>
      <text:h text:style-name="P51" text:outline-level="2"><text:span text:style-name="T1">A</text:span>. Description du Test</text:h>
      <text:p text:style-name="P6"><text:span text:style-name="T2">Objectif du test </text:span>: É<text:span text:style-name="T1">valuer </text:span><text:span text:style-name="T19">le comportement du modèle : </text:span></text:p>
      <text:p text:style-name="P8">a- Match entre une équipe ultra-offensive contre une équipe ultra-défensive </text:p>
      <text:p text:style-name="P6"><text:span text:style-name="T26">b</text:span>- <text:span text:style-name="T26">Match avec des gardiens plus grand et plus rapide</text:span></text:p>
      <text:p text:style-name="P6"><text:span text:style-name="T26">c</text:span>- <text:span text:style-name="T26">Match avec un taux de chance de tacle de 0 %</text:span></text:p>
      <text:p text:style-name="P7">d- Match avec un taux de chance de tacle <text:s/>de 100 %</text:p>
      <text:p text:style-name="P3"/>
      <text:p text:style-name="P3"><text:span text:style-name="T2">Comportement théorique attendu</text:span> : <text:span text:style-name="T5">On s’attend à ce que :</text:span></text:p>
      <text:p text:style-name="P7">a- La balle alterne entre les deux camps, avec un score élevé du coté des ultra-offensifs.</text:p>
      <text:p text:style-name="P7">b- Une baisse du nombre de buts des 2 cotés, et donc la b<text:span text:style-name="T36">a</text:span>lle qui se retrouve plus au milieu.</text:p>
      <text:p text:style-name="P7">c- Des attaquants qui progressent plus facilement de part et d’autres des 2 camps, un score élevé.</text:p>
      <text:p text:style-name="P7">d- Des attaquants systématique stoppées, un score faible voir nul.</text:p>
      <text:h text:style-name="P51" text:outline-level="2"><text:soft-page-break/><text:span text:style-name="T1">B</text:span>. Résultats Bruts (<text:span text:style-name="T23">4</text:span> matchs)</text:h>
      <table:table table:name="Tableau4" table:style-name="Tableau4">
        <table:table-column table:style-name="Tableau4.A" table:number-columns-repeated="3"/>
        <table:table-row>
          <table:table-cell table:style-name="Tableau4.A1" office:value-type="string">
            <text:p text:style-name="P17">Match</text:p>
          </table:table-cell>
          <table:table-cell table:style-name="Tableau4.A1" office:value-type="string">
            <text:p text:style-name="P17">Paramètres modifiés <text:span text:style-name="T5">(Nombre ; speed)</text:span></text:p>
          </table:table-cell>
          <table:table-cell table:style-name="Tableau4.C1" office:value-type="string">
            <text:p text:style-name="P17">Résultats</text:p>
          </table:table-cell>
        </table:table-row>
        <table:table-row>
          <table:table-cell table:style-name="Tableau4.A2" office:value-type="string">
            <text:p text:style-name="P17">1</text:p>
          </table:table-cell>
          <table:table-cell table:style-name="Tableau4.A2" office:value-type="string">
            <text:p text:style-name="P25"><text:span text:style-name="T6">Barça </text:span>: Attaquants (<text:span text:style-name="T26">20</text:span> ; <text:span text:style-name="T26">1.5</text:span> )</text:p>
            <text:p text:style-name="P25">Défenseurs (<text:span text:style-name="T26">5</text:span> ; 0.<text:span text:style-name="T27">3</text:span> )</text:p>
            <text:p text:style-name="P25"/>
            <text:p text:style-name="P25"/>
            <text:p text:style-name="P25"><text:span text:style-name="T7">Réal </text:span>: Attaquants (<text:span text:style-name="T26">5</text:span> ; 0.3 )</text:p>
            <text:p text:style-name="P25">Défenseurs (<text:span text:style-name="T26">20</text:span> ; 1.<text:span text:style-name="T26">5</text:span> )</text:p>
          </table:table-cell>
          <table:table-cell table:style-name="Tableau4.C2" office:value-type="string">
            <text:p text:style-name="P34">Scores : <text:span text:style-name="T28">12</text:span>– <text:span text:style-name="T24">6</text:span><text:span text:style-name="T28">4</text:span> pour le <text:span text:style-name="T24">Réal</text:span></text:p>
            <text:p text:style-name="P34"><draw:frame draw:style-name="fr1" draw:name="Image17" text:anchor-type="char" svg:width="5.438cm" svg:height="2.111cm" draw:z-index="15"><draw:image xlink:href="Pictures/10000001000001E9000000BEDAFB31E7.png" xlink:type="simple" xlink:show="embed" xlink:actuate="onLoad" draw:mime-type="image/png"/></draw:frame></text:p>
            <text:p text:style-name="P34"/>
          </table:table-cell>
        </table:table-row>
        <table:table-row>
          <table:table-cell table:style-name="Tableau4.A2" office:value-type="string">
            <text:p text:style-name="P17">2</text:p>
          </table:table-cell>
          <table:table-cell table:style-name="Tableau4.A2" office:value-type="string">
            <text:p text:style-name="P25"><text:span text:style-name="T6">Barça </text:span>: Attaquants (<text:span text:style-name="T20">5</text:span> ; <text:span text:style-name="T20">0.3</text:span> )</text:p>
            <text:p text:style-name="P25">Défenseurs (<text:span text:style-name="T20">5</text:span> ; <text:span text:style-name="T27">0.</text:span>1 )</text:p>
            <text:p text:style-name="P25"/>
            <text:p text:style-name="P38">Gardien (Size : <text:span text:style-name="T29">3</text:span> ; vitesse:1.5 ; <text:span text:style-name="T28">bras-gardien:</text:span><text:span text:style-name="T29">3</text:span>)</text:p>
            <text:p text:style-name="P38"/>
            <text:p text:style-name="P25"><text:span text:style-name="T7">Réal </text:span>: Attaquants (<text:span text:style-name="T20">5</text:span> ; <text:span text:style-name="T23">0.3</text:span> )</text:p>
            <text:p text:style-name="P25">Défenseurs (<text:span text:style-name="T20">5</text:span> ; <text:span text:style-name="T23">0.1</text:span> )</text:p>
          </table:table-cell>
          <table:table-cell table:style-name="Tableau4.C2" office:value-type="string">
            <text:p text:style-name="P34">Scores : <text:span text:style-name="T29">12</text:span><text:span text:style-name="T9"> </text:span>– <text:span text:style-name="T29">8</text:span> pour le <text:span text:style-name="T29">Barça</text:span></text:p>
            <text:p text:style-name="P34"><draw:frame draw:style-name="fr1" draw:name="Image14" text:anchor-type="char" svg:width="5.438cm" svg:height="2.272cm" draw:z-index="16"><draw:image xlink:href="Pictures/10000001000001E1000000C986D5BC6F.png" xlink:type="simple" xlink:show="embed" xlink:actuate="onLoad" draw:mime-type="image/png"/></draw:frame></text:p>
          </table:table-cell>
        </table:table-row>
        <table:table-row>
          <table:table-cell table:style-name="Tableau4.A2" office:value-type="string">
            <text:p text:style-name="P17">3 </text:p>
          </table:table-cell>
          <table:table-cell table:style-name="Tableau4.A2" office:value-type="string">
            <text:p text:style-name="P26"><text:span text:style-name="T6">Barça </text:span>: Attaquants (<text:span text:style-name="T20">5</text:span> ; <text:span text:style-name="T20">0.3</text:span> )</text:p>
            <text:p text:style-name="P26">Défenseurs (<text:span text:style-name="T20">5</text:span> ; <text:span text:style-name="T27">0.</text:span>1 )</text:p>
            <text:p text:style-name="P26"/>
            <text:p text:style-name="P38">tacle-chance : 0 %</text:p>
            <text:p text:style-name="P38"/>
            <text:p text:style-name="P26"><text:span text:style-name="T7">Réal </text:span>: Attaquants (<text:span text:style-name="T20">5</text:span> ; <text:span text:style-name="T23">0.3</text:span> )</text:p>
            <text:p text:style-name="P26">Défenseurs (<text:span text:style-name="T20">5</text:span> ; <text:span text:style-name="T23">0.1</text:span> )</text:p>
          </table:table-cell>
          <table:table-cell table:style-name="Tableau4.C2" office:value-type="string">
            <text:p text:style-name="P36">Scores : <text:span text:style-name="T28">20</text:span><text:span text:style-name="T9"> </text:span>– <text:span text:style-name="T28">28</text:span> pour le <text:span text:style-name="T28">Réal</text:span></text:p>
            <text:p text:style-name="P34"><draw:frame draw:style-name="fr1" draw:name="Image16" text:anchor-type="char" svg:width="5.438cm" svg:height="2.111cm" draw:z-index="14"><draw:image xlink:href="Pictures/10000001000001E9000000BEBD98B3C5.png" xlink:type="simple" xlink:show="embed" xlink:actuate="onLoad" draw:mime-type="image/png"/></draw:frame></text:p>
          </table:table-cell>
        </table:table-row>
        <table:table-row>
          <table:table-cell table:style-name="Tableau4.A2" office:value-type="string">
            <text:p text:style-name="P17">4 </text:p>
          </table:table-cell>
          <table:table-cell table:style-name="Tableau4.A2" office:value-type="string">
            <text:p text:style-name="P26"><text:span text:style-name="T6">Barça </text:span>: Attaquants (<text:span text:style-name="T20">5</text:span> ; <text:span text:style-name="T20">0.3</text:span> )</text:p>
            <text:p text:style-name="P26">Défenseurs (<text:span text:style-name="T20">5</text:span> ; <text:span text:style-name="T27">0.</text:span>1 )</text:p>
            <text:p text:style-name="P26"/>
            <text:p text:style-name="P38">tacle-chance : 100 %</text:p>
            <text:p text:style-name="P38"/>
            <text:p text:style-name="P26"><text:span text:style-name="T7">Réal </text:span>: Attaquants (<text:span text:style-name="T20">5</text:span> ; <text:span text:style-name="T23">0.3</text:span> )</text:p>
            <text:p text:style-name="P26">Défenseurs (<text:span text:style-name="T20">5</text:span> ; <text:span text:style-name="T23">0.1</text:span> )</text:p>
          </table:table-cell>
          <table:table-cell table:style-name="Tableau4.C2" office:value-type="string">
            <text:p text:style-name="P35">Scores : 3<text:span text:style-name="T28">4</text:span><text:span text:style-name="T9"> </text:span>– <text:span text:style-name="T28">20</text:span> pour le <text:span text:style-name="T24">Barça</text:span></text:p>
            <text:p text:style-name="P34"><draw:frame draw:style-name="fr1" draw:name="Image15" text:anchor-type="char" svg:width="5.438cm" svg:height="2.111cm" draw:z-index="13"><draw:image xlink:href="Pictures/10000001000001E9000000BE7F67F349.png" xlink:type="simple" xlink:show="embed" xlink:actuate="onLoad" draw:mime-type="image/png"/></draw:frame></text:p>
          </table:table-cell>
        </table:table-row>
      </table:table>
      <text:p text:style-name="P3"/>
      <text:h text:style-name="P47" text:outline-level="1"><text:span text:style-name="Strong_20_Emphasis"><text:span text:style-name="T30">C. Analyse des Résultats </text:span></text:span></text:h>
      <text:p text:style-name="Text_20_body">Ce quatrième test vise à observer comment le modèle réagit face à des conditions extrêmes et non réalistes. Chaque match isole une variable clé : déséquilibre offensif/défensif, puissance du gardien, absence totale de tacle, ou tacle systématique.<text:line-break/>L’objectif est de comprendre quelles mécaniques dominent réellement dans <text:span text:style-name="T37">le</text:span> modèle.</text:p>
      <text:h text:style-name="Heading_20_2" text:outline-level="2" text:is-list-header="true"><text:span text:style-name="Strong_20_Emphasis">Match 1 – Ultra-offensif contre Ultra-défensif</text:span></text:h>
      <text:p text:style-name="Text_20_body"><text:span text:style-name="Strong_20_Emphasis">Paramètres :</text:span></text:p>
      <text:list text:style-name="L28">
        <text:list-item>
          <text:p text:style-name="P81"><text:span text:style-name="Strong_20_Emphasis">Barça :</text:span> 20 attaquants (1.5), 5 défenseurs (0.3)</text:p>
        </text:list-item>
        <text:list-item>
          <text:p text:style-name="P81"><text:span text:style-name="Strong_20_Emphasis">Réal :</text:span> 5 attaquants (0.3), 20 défenseurs (1.5)</text:p>
        </text:list-item>
      </text:list>
      <text:p text:style-name="Text_20_body"><text:span text:style-name="Strong_20_Emphasis">Résultat : 12 – 64 pour le Réal</text:span></text:p>
      <text:p text:style-name="Text_20_body"><text:soft-page-break/><text:span text:style-name="Strong_20_Emphasis">Analyse :</text:span><text:line-break/>La défense du Réal, très nombreuse et très rapide, écrase totalement le jeu offensif du Barça.<text:line-break/>Même avec beaucoup d’attaquants rapides, le Barça ne parvient pas à progresser :</text:p>
      <text:list text:style-name="L29">
        <text:list-item>
          <text:p text:style-name="P82">ses attaquants se font intercepter,</text:p>
        </text:list-item>
        <text:list-item>
          <text:p text:style-name="P82">la balle reste dans sa moitié de terrain,</text:p>
        </text:list-item>
        <text:list-item>
          <text:p text:style-name="P82">la densité défensive du Réal étouffe toute tentative d’attaque.</text:p>
        </text:list-item>
      </text:list>
      <text:p text:style-name="Text_20_body"><text:span text:style-name="Strong_20_Emphasis">C’est la démonstration la plus forte du test : la défense domine largement l’attaque dans ce modèle.</text:span></text:p>
      <text:h text:style-name="Heading_20_2" text:outline-level="2" text:is-list-header="true"><text:span text:style-name="Strong_20_Emphasis">Match 2 – Gardien fortement amélioré</text:span></text:h>
      <text:p text:style-name="Text_20_body"><text:span text:style-name="Strong_20_Emphasis">Paramètres :</text:span><text:line-break/>Équipes parfaitement symétriques sauf un point :</text:p>
      <text:list text:style-name="L30">
        <text:list-item>
          <text:p text:style-name="P83">Gardien modifié (taille 3, vitesse 1.5, bras-gardien 3) côté Barça.</text:p>
        </text:list-item>
      </text:list>
      <text:p text:style-name="Text_20_body"><text:span text:style-name="Strong_20_Emphasis">Résultat : 12 – 8 pour le Barça</text:span></text:p>
      <text:p text:style-name="Text_20_body"><text:span text:style-name="Strong_20_Emphasis">Analyse :</text:span><text:line-break/>Le Barça encaisse beaucoup moins de buts que dans un match équilibré classique. L’amélioration simultanée de :</text:p>
      <text:list text:style-name="L31">
        <text:list-item>
          <text:p text:style-name="P84">sa <text:span text:style-name="Strong_20_Emphasis">vitesse</text:span>,</text:p>
        </text:list-item>
        <text:list-item>
          <text:p text:style-name="P84">sa <text:span text:style-name="Strong_20_Emphasis">taille</text:span>,</text:p>
        </text:list-item>
        <text:list-item>
          <text:p text:style-name="P84">son <text:span text:style-name="Strong_20_Emphasis">rayon de perception</text:span>,</text:p>
        </text:list-item>
      </text:list>
      <text:p text:style-name="Text_20_body">fait du gardien une barrière beaucoup plus difficile à franchir.</text:p>
      <text:p text:style-name="Text_20_body">Cependant, la victoire reste modérée (12–8) alors qu’on aurait pu s’attendre à une domination totale.</text:p>
      <text:p text:style-name="Text_20_body">Cela prouve quelque chose d’essentiel :<text:line-break/><text:span text:style-name="Strong_20_Emphasis">Même un gardien très fort ne suffit pas à transformer radicalement le déroulement d’un match.</text:span><text:line-break/>Le rôle du gardien est important mais reste localisé à une zone.<text:line-break/>C’est le comportement collectif (passes, placements, interceptions) qui domine réellement la dynamique du jeu.</text:p>
      <text:h text:style-name="Heading_20_2" text:outline-level="2" text:is-list-header="true"><text:span text:style-name="Strong_20_Emphasis">Match 3 – Tacle-chance = 0 %</text:span></text:h>
      <text:p text:style-name="Text_20_body"><text:span text:style-name="Strong_20_Emphasis">Paramètres :</text:span> équipes strictement identiques, mais aucun tacle n’est possible.</text:p>
      <text:p text:style-name="Text_20_body"><text:span text:style-name="Strong_20_Emphasis">Résultat : 20 – 28 pour le Réal</text:span></text:p>
      <text:p text:style-name="Text_20_body"><text:span text:style-name="Strong_20_Emphasis">Analyse :</text:span><text:line-break/>Sans tacle :</text:p>
      <text:list text:style-name="L32">
        <text:list-item>
          <text:p text:style-name="P85">les défenses ne peuvent plus arracher la balle,</text:p>
        </text:list-item>
        <text:list-item>
          <text:p text:style-name="P85">le jeu est plus fluide et plus orienté vers l’avant,</text:p>
        </text:list-item>
        <text:list-item>
          <text:p text:style-name="P85"><text:soft-page-break/>les comportements de passes et de collisions deviennent déterminants.</text:p>
        </text:list-item>
      </text:list>
      <text:p text:style-name="Text_20_body">Le léger avantage du Réal (28 contre 20) peut résulter :</text:p>
      <text:list text:style-name="L33">
        <text:list-item>
          <text:p text:style-name="P86">de micro-différences de placement,</text:p>
        </text:list-item>
        <text:list-item>
          <text:p text:style-name="P86">du sens initial du jeu,</text:p>
        </text:list-item>
        <text:list-item>
          <text:p text:style-name="P86">d’une meilleure exploitation des rebonds.</text:p>
        </text:list-item>
      </text:list>
      <text:p text:style-name="Text_20_body">Le modèle révèle que <text:span text:style-name="Strong_20_Emphasis">sans tacle, le match dépend davantage du flux naturel des déplacements que de l’opposition directe</text:span>.</text:p>
      <text:h text:style-name="Heading_20_2" text:outline-level="2" text:is-list-header="true"><text:span text:style-name="Strong_20_Emphasis">Match 4 – Tacle-chance = 100 %</text:span></text:h>
      <text:p text:style-name="Text_20_body"><text:span text:style-name="Strong_20_Emphasis">Paramètres :</text:span> équipes identiques, mais chaque tacle réussit automatiquement.</text:p>
      <text:p text:style-name="Text_20_body"><text:span text:style-name="Strong_20_Emphasis">Résultat : 34 – 20 pour le Barça</text:span></text:p>
      <text:p text:style-name="Text_20_body"><text:span text:style-name="Strong_20_Emphasis">Analyse :</text:span><text:line-break/>Avec un tacle systématiquement réussi :</text:p>
      <text:list text:style-name="L34">
        <text:list-item>
          <text:p text:style-name="P87">les phases de jeu deviennent très courtes,</text:p>
        </text:list-item>
        <text:list-item>
          <text:p text:style-name="P87">la balle change de possession presque instantanément,</text:p>
        </text:list-item>
        <text:list-item>
          <text:p text:style-name="P87">la progression repose uniquement sur les quelques mètres gagnés entre chaque interception.</text:p>
        </text:list-item>
      </text:list>
      <text:p text:style-name="Text_20_body">Le Barça s’en sort mieux, probablement parce qu’il se repositionne légèrement plus vite et profite mieux des micro-avances.</text:p>
      <text:p text:style-name="Text_20_body"><text:s/>Le tacle à 100 % transforme le match en duel permanent, dominé par la micro-dynamique du placement.</text:p>
      <text:h text:style-name="Heading_20_1" text:outline-level="1" text:is-list-header="true"><text:span text:style-name="Strong_20_Emphasis"><text:span text:style-name="T30">Analyse Globale</text:span></text:span></text:h>
      <text:p text:style-name="Text_20_body">Les quatre expériences montrent plusieurs comportements forts :</text:p>
      <text:h text:style-name="Heading_20_3" text:outline-level="3"><text:s/>1. La défense est la variable la plus puissante du modèle</text:h>
      <text:p text:style-name="Text_20_body">Match 1 le montre sans ambiguïté :<text:line-break/><text:span text:style-name="Strong_20_Emphasis">un excès de défense écrase même une attaque très renforcée.</text:span></text:p>
      <text:h text:style-name="Heading_20_3" text:outline-level="3"><text:s/>2. Le gardien, même surboosté, influence peu la dynamique générale</text:h>
      <text:p text:style-name="Text_20_body">Il réduit les buts encaissés, mais ne suffit pas à renverser un match.</text:p>
      <text:h text:style-name="Heading_20_3" text:outline-level="3"><text:s/>3. Le taux de tacle change radicalement le style de jeu</text:h>
      <text:list text:style-name="L35">
        <text:list-item>
          <text:p text:style-name="P88">0 % : jeu fluide, offensif, peu agressif</text:p>
        </text:list-item>
        <text:list-item>
          <text:p text:style-name="P88">100 % : jeu haché, basé sur la récupération instantanée et le placement</text:p>
        </text:list-item>
      </text:list>
      <text:h text:style-name="Heading_20_3" text:outline-level="3"><text:s/>4. Le modèle reste cohérent même sous conditions extrêmes</text:h>
      <text:p text:style-name="Text_20_body">Les résultats sont toujours logiques et justifiables, ce qui montre une bonne stabilité du modèle.</text:p>
      <text:h text:style-name="Heading_20_1" text:outline-level="1" text:is-list-header="true"><text:soft-page-break/><text:span text:style-name="Strong_20_Emphasis"><text:span text:style-name="T30">D. Conclusion </text:span></text:span></text:h>
      <text:p text:style-name="Text_20_body">Ce test met en lumière les forces structurelles du modèle :</text:p>
      <text:h text:style-name="Heading_20_3" text:outline-level="3">● La défense est l’élément qui influence le plus le score</text:h>
      <text:p text:style-name="Text_20_body">Nombre de défenseurs + vitesse : impact majeur.</text:p>
      <text:h text:style-name="Heading_20_3" text:outline-level="3">● Le gardien améliore la solidité mais ne change pas le déroulement du match</text:h>
      <text:p text:style-name="Text_20_body">Même boosté, il n’agit que sur une petite zone.</text:p>
      <text:h text:style-name="Heading_20_3" text:outline-level="3">● Le tacle est un levier fondamental de la dynamique</text:h>
      <text:p text:style-name="Text_20_body">Il peut rendre le jeu offensif (0 %) ou ultra-défensif (100 %).</text:p>
      <text:h text:style-name="Heading_20_3" text:outline-level="3">● Le modèle réagit toujours de manière compréhensible</text:h>
      <text:p text:style-name="Text_20_body">Aucun comportement incohérent n’a été observé, même avec des valeurs extrêmes.</text:p>
      <text:p text:style-name="P3"/>
      <text:h text:style-name="P47" text:outline-level="1"><text:span text:style-name="Strong_20_Emphasis"><text:span text:style-name="T33">Conclusion</text:span></text:span></text:h>
      <text:p text:style-name="Text_20_body">À travers l’ensemble de nos tests, notre modèle montre qu’il fonctionne conformément à nos attentes initiales. Lorsque les deux équipes possèdent les mêmes paramètres, les matchs restent globalement équilibrés : les scores varient, mais aucune équipe ne domine systématiquement, ce qui confirme l’équité du système.</text:p>
      <text:p text:style-name="Text_20_body">Dès que nous modifions un paramètre vitesse, nombre de joueurs, capacité du gardien ou probabilité de tacle l’impact sur le match est immédiat et logique. Une équipe avec plus d’attaquants marque davantage ; une défense renforcée encaisse moins ; un gardien plus rapide ou avec un rayon d’interception plus large change radicalement le rythme de la partie. Le modèle réagit donc de façon cohérente et prévisible.</text:p>
      <text:p text:style-name="Text_20_body">Dans l’ensemble, notre simulation remplit son objectif : représenter un match de football simple mais crédible, où chaque rôle influence réellement le déroulement du jeu. Malgré sa simplicité, le modèle produit des comportements variés et plausibles, ce qui montre qu’un ensemble de règles bien choisies peut donner naissance à une dynamique collective réalist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08T10:37:26.674712776</dc:date>
    <meta:editing-duration>PT33M22S</meta:editing-duration>
    <meta:editing-cycles>6</meta:editing-cycles>
    <meta:document-statistic meta:table-count="4" meta:image-count="18" meta:object-count="0" meta:page-count="16" meta:paragraph-count="382" meta:word-count="4438" meta:character-count="25536" meta:non-whitespace-character-count="21522"/>
  </office:meta>
</office:document-meta>
</file>